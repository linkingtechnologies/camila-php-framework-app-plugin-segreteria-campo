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9400000050444C9887.png" manifest:media-type="image/png"/>
  <manifest:file-entry manifest:full-path="Pictures/1000000100000246000001B68D2530BE.png" manifest:media-type="image/png"/>
  <manifest:file-entry manifest:full-path="Pictures/10000001000003C0000000431AB4EBE9.png" manifest:media-type="image/png"/>
  <manifest:file-entry manifest:full-path="Pictures/100000000000013500000015D2F2730F.png" manifest:media-type="image/png"/>
  <manifest:file-entry manifest:full-path="Pictures/100000000000036C000000A8FD16444E.png" manifest:media-type="image/png"/>
  <manifest:file-entry manifest:full-path="Pictures/100000000000025A0000019064165E9A.png" manifest:media-type="image/png"/>
  <manifest:file-entry manifest:full-path="Pictures/1000000000000365000000C2ADD32A9E.png" manifest:media-type="image/png"/>
  <manifest:file-entry manifest:full-path="Pictures/10000000000001DE0000023995C74AA4.png" manifest:media-type="image/png"/>
  <manifest:file-entry manifest:full-path="Pictures/100000000000034200000039C8AF743C.png" manifest:media-type="image/png"/>
  <manifest:file-entry manifest:full-path="Pictures/10000001000002B90000006F2919D0E0.png" manifest:media-type="image/png"/>
  <manifest:file-entry manifest:full-path="Pictures/1000000100000372000000806A84298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margin-left="0cm" fo:text-align="left" style:justify-single-word="false" fo:text-indent="0cm" style:auto-text-indent="false" style:writing-mode="lr-tb"/>
      <style:text-properties style:font-name="Arial"/>
    </style:style>
    <style:style style:name="P5" style:family="paragraph" style:parent-style-name="Heading_20_1">
      <style:paragraph-properties fo:margin-left="0cm" fo:margin-top="0cm" fo:margin-bottom="0.212cm" style:contextual-spacing="false" fo:text-align="left" style:justify-single-word="false" fo:text-indent="0cm" style:auto-text-indent="false" fo:break-before="page" style:writing-mode="lr-tb"/>
    </style:style>
    <style:style style:name="P6"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style>
    <style:style style:name="P7" style:family="paragraph" style:parent-style-name="Heading_20_2">
      <style:paragraph-properties fo:margin-left="0cm" fo:text-align="left" style:justify-single-word="false" fo:text-indent="0cm" style:auto-text-indent="false" style:writing-mode="lr-tb"/>
    </style:style>
    <style:style style:name="P8" style:family="paragraph" style:parent-style-name="Heading_20_3">
      <style:paragraph-properties fo:margin-left="0cm" fo:text-align="left" style:justify-single-word="false" fo:text-indent="0cm" style:auto-text-indent="false" style:writing-mode="lr-tb"/>
    </style:style>
    <style:style style:name="P9" style:family="paragraph" style:parent-style-name="Text_20_body" style:list-style-name="WWNum2">
      <style:paragraph-properties fo:margin-top="0cm" fo:margin-bottom="0cm" style:contextual-spacing="false" fo:text-align="left" style:justify-single-word="false" fo:orphans="2" fo:widows="2" style:writing-mode="lr-tb"/>
    </style:style>
    <style:style style:name="P10" style:family="paragraph" style:parent-style-name="Text_20_body">
      <style:paragraph-properties fo:margin-top="0cm" fo:margin-bottom="0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11" style:family="paragraph" style:parent-style-name="Text_20_body" style:list-style-name="WWNum3">
      <style:paragraph-properties fo:margin-top="0cm" fo:margin-bottom="0cm" style:contextual-spacing="false" fo:text-align="left" style:justify-single-word="false" fo:orphans="2" fo:widows="2" style:writing-mode="lr-tb"/>
    </style:style>
    <style:style style:name="P12"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style:font-name="Arial"/>
    </style:style>
    <style:style style:name="P13" style:family="paragraph" style:parent-style-name="Text_20_body" style:list-style-name="WWNum4">
      <style:paragraph-properties fo:margin-top="0cm" fo:margin-bottom="0cm" style:contextual-spacing="false" fo:text-align="left" style:justify-single-word="false" fo:orphans="2" fo:widows="2" style:writing-mode="lr-tb"/>
    </style:style>
    <style:style style:name="P14" style:family="paragraph" style:parent-style-name="Text_20_body" style:list-style-name="WWNum5">
      <style:paragraph-properties fo:margin-top="0cm" fo:margin-bottom="0cm" style:contextual-spacing="false" fo:text-align="left" style:justify-single-word="false" fo:orphans="2" fo:widows="2" style:writing-mode="lr-tb"/>
    </style:style>
    <style:style style:name="P15" style:family="paragraph" style:parent-style-name="Text_20_body">
      <style:paragraph-properties fo:text-align="left" style:justify-single-word="false" style:writing-mode="lr-tb"/>
      <style:text-properties style:font-name="Arial"/>
    </style:style>
    <style:style style:name="P16" style:family="paragraph" style:parent-style-name="Text_20_body" style:list-style-name="WWNum6">
      <style:paragraph-properties fo:margin-top="0cm" fo:margin-bottom="0.265cm" style:contextual-spacing="false" fo:text-align="left" style:justify-single-word="false" fo:orphans="2" fo:widows="2" style:writing-mode="lr-tb"/>
    </style:style>
    <style:style style:name="P17" style:family="paragraph" style:parent-style-name="Text_20_body">
      <style:paragraph-properties fo:text-align="left" style:justify-single-word="false" style:writing-mode="lr-tb"/>
    </style:style>
    <style:style style:name="P18" style:family="paragraph" style:parent-style-name="Text_20_body" style:list-style-name="WWNum7">
      <style:paragraph-properties fo:text-align="left" style:justify-single-word="false" style:writing-mode="lr-tb"/>
    </style:style>
    <style:style style:name="P19" style:family="paragraph" style:parent-style-name="Heading_20_1">
      <style:paragraph-properties fo:margin-left="0cm" fo:text-align="left" style:justify-single-word="false" fo:text-indent="0cm" style:auto-text-indent="false" style:writing-mode="lr-tb"/>
    </style:style>
    <style:style style:name="P20" style:family="paragraph" style:parent-style-name="Text_20_body" style:list-style-name="WWNum8">
      <style:paragraph-properties fo:text-align="left" style:justify-single-word="false" style:writing-mode="lr-tb"/>
    </style:style>
    <style:style style:name="P21" style:family="paragraph" style:parent-style-name="Text_20_body" style:list-style-name="WWNum9">
      <style:paragraph-properties fo:margin-top="0cm" fo:margin-bottom="0cm" style:contextual-spacing="false" fo:text-align="left" style:justify-single-word="false" fo:orphans="2" fo:widows="2" style:writing-mode="lr-tb"/>
    </style:style>
    <style:style style:name="P22" style:family="paragraph" style:parent-style-name="Text_20_body">
      <style:paragraph-properties fo:margin-left="1.27cm" fo:margin-top="0cm" fo:margin-bottom="0cm" style:contextual-spacing="false" fo:text-align="left" style:justify-single-word="false" fo:orphans="2" fo:widows="2" fo:text-indent="0cm" style:auto-text-indent="false" style:writing-mode="lr-tb"/>
    </style:style>
    <style:style style:name="P23" style:family="paragraph" style:parent-style-name="Text_20_body">
      <style:paragraph-properties fo:margin-left="1.27cm" fo:margin-top="0cm" fo:margin-bottom="0cm" style:contextual-spacing="false" fo:text-align="lef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24" style:family="paragraph" style:parent-style-name="Text_20_body" style:list-style-name="WWNum10">
      <style:paragraph-properties fo:margin-top="0cm" fo:margin-bottom="0cm" style:contextual-spacing="false" fo:text-align="left" style:justify-single-word="false" fo:orphans="2" fo:widows="2" style:writing-mode="lr-tb"/>
    </style:style>
    <style:style style:name="P25" style:family="paragraph" style:parent-style-name="Text_20_body" style:list-style-name="WWNum11">
      <style:paragraph-properties fo:margin-top="0cm" fo:margin-bottom="0cm" style:contextual-spacing="false" fo:text-align="left" style:justify-single-word="false" fo:orphans="2" fo:widows="2" style:writing-mode="lr-tb"/>
    </style:style>
    <style:style style:name="P26" style:family="paragraph" style:parent-style-name="Text_20_body" style:list-style-name="WWNum12">
      <style:paragraph-properties fo:margin-top="0cm" fo:margin-bottom="0cm" style:contextual-spacing="false" fo:text-align="left" style:justify-single-word="false" fo:orphans="2" fo:widows="2" style:writing-mode="lr-tb"/>
    </style:style>
    <style:style style:name="P27" style:family="paragraph" style:parent-style-name="Text_20_body">
      <style:paragraph-properties fo:margin-top="0cm" fo:margin-bottom="0.247cm" style:contextual-spacing="false" fo:line-height="115%" fo:text-align="left" style:justify-single-word="false" style:writing-mode="lr-tb"/>
    </style:style>
    <style:style style:name="P28" style:family="paragraph" style:parent-style-name="Heading_20_2">
      <style:paragraph-properties fo:margin-left="0cm" fo:margin-top="0.353cm" fo:margin-bottom="0.212cm" style:contextual-spacing="false" fo:text-align="left" style:justify-single-word="false" fo:text-indent="0cm" style:auto-text-indent="false" style:writing-mode="lr-tb"/>
    </style:style>
    <style:style style:name="P29" style:family="paragraph" style:parent-style-name="Text_20_body">
      <style:paragraph-properties fo:margin-top="0cm" fo:margin-bottom="0.265cm" style:contextual-spacing="false" fo:text-align="left" style:justify-single-word="false" fo:orphans="2" fo:widows="2" style:writing-mode="lr-tb"/>
    </style:style>
    <style:style style:name="P30" style:family="paragraph" style:parent-style-name="List_20_1">
      <style:paragraph-properties fo:text-align="left" style:justify-single-word="false" style:writing-mode="lr-tb"/>
    </style:style>
    <style:style style:name="P31" style:family="paragraph" style:parent-style-name="Text_20_body" style:list-style-name="WWNum13">
      <style:paragraph-properties fo:margin-top="0cm" fo:margin-bottom="0cm" style:contextual-spacing="false" fo:text-align="left" style:justify-single-word="false" fo:orphans="2" fo:widows="2" style:writing-mode="lr-tb"/>
    </style:style>
    <style:style style:name="P32" style:family="paragraph" style:parent-style-name="Text_20_body" style:list-style-name="WWNum14">
      <style:paragraph-properties fo:margin-top="0cm" fo:margin-bottom="0cm" style:contextual-spacing="false" fo:text-align="left" style:justify-single-word="false" fo:orphans="2" fo:widows="2" style:writing-mode="lr-tb"/>
    </style:style>
    <style:style style:name="P33" style:family="paragraph" style:parent-style-name="Text_20_body" style:list-style-name="WWNum15">
      <style:paragraph-properties fo:margin-top="0cm" fo:margin-bottom="0.265cm" style:contextual-spacing="false" fo:text-align="left" style:justify-single-word="false" fo:orphans="2" fo:widows="2" style:writing-mode="lr-tb"/>
    </style:style>
    <style:style style:name="P34" style:family="paragraph" style:parent-style-name="Heading_20_2">
      <style:paragraph-properties fo:margin-left="0cm" fo:margin-top="0.353cm" fo:margin-bottom="0.212cm" style:contextual-spacing="false" fo:text-align="left" style:justify-single-word="false" fo:text-indent="0cm" style:auto-text-indent="false" style:writing-mode="lr-tb"/>
      <style:text-properties style:font-name="Arial"/>
    </style:style>
    <style:style style:name="T1" style:family="text">
      <style:text-properties style:font-name="Arial"/>
    </style:style>
    <style:style style:name="T2" style:family="text">
      <style:text-properties fo:font-variant="normal" fo:text-transform="none" fo:color="#337ab7"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tyle-asian="normal" style:font-weight-asian="normal"/>
    </style:style>
    <style:style style:name="T3" style:family="text">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T4" style:family="text">
      <style:text-properties fo:font-variant="normal" fo:text-transform="none" fo:color="#333333" loext:opacity="100%" fo:font-family="'Helvetica Neue', Helvetica, Arial, sans-serif" style:font-family-generic="swiss" style:font-pitch="variable" fo:font-size="12pt" fo:letter-spacing="normal" fo:font-style="normal" fo:font-weight="normal" style:font-size-asian="12pt" style:font-style-asian="normal" style:font-weight-asian="normal"/>
    </style:style>
    <style:style style:name="T5" style:family="text">
      <style:text-properties fo:font-variant="normal" fo:text-transform="none" fo:color="#333333" loext:opacity="100%" style:font-name="Arial" fo:font-size="12pt" fo:letter-spacing="normal" fo:font-style="italic" fo:font-weight="bold" style:font-size-asian="12pt" style:font-style-asian="italic" style:font-weight-asian="bold" style:font-style-complex="italic" style:font-weight-complex="bold"/>
    </style:style>
    <style:style style:name="T6"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tyle-complex="italic"/>
    </style:style>
    <style:style style:name="T7" style:family="text">
      <style:text-properties fo:font-variant="normal" fo:text-transform="none" fo:color="#333333" loext:opacity="100%" style:font-name="Arial" fo:font-size="12pt" fo:letter-spacing="normal" fo:font-style="normal" fo:font-weight="bold" style:font-size-asian="12pt" style:font-style-asian="normal" style:font-weight-asian="bold" style:font-weight-complex="bold"/>
    </style:style>
    <style:style style:name="T8" style:family="text">
      <style:text-properties fo:color="#000000" loext:opacity="100%" style:font-name="Arial"/>
    </style:style>
    <style:style style:name="T9" style:family="text">
      <style:text-properties fo:font-variant="normal" fo:text-transform="none" fo:color="#000000" loext:opacity="100%" style:font-name="Arial" fo:font-size="12pt" fo:letter-spacing="normal" fo:font-style="normal" fo:font-weight="normal" style:font-size-asian="12pt" style:font-style-asian="normal" style:font-weight-asian="normal"/>
    </style:style>
    <style:style style:name="T10" style:family="text">
      <style:text-properties fo:color="#000000" loext:opacity="100%"/>
    </style:style>
    <style:style style:name="T11"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tyle-asian="normal" style:font-weight-asian="normal"/>
    </style:style>
    <style:style style:name="T12" style:family="text">
      <style:text-properties fo:font-variant="normal" fo:text-transform="none" fo:color="#333333" loext:opacity="100%" style:font-name="Arial" fo:letter-spacing="normal"/>
    </style:style>
    <style:style style:name="T13" style:family="text">
      <style:text-properties fo:font-variant="normal" fo:text-transform="none" fo:color="#333333" loext:opacity="100%" style:font-name="Arial" fo:font-size="12pt" fo:letter-spacing="normal" fo:font-style="normal" fo:font-weight="bold" style:font-size-asian="12pt" style:font-style-asian="normal" style:font-weight-asian="bold"/>
    </style:style>
    <style:style style:name="T14" style:family="text">
      <style:text-properties fo:color="#333333" loext:opacity="100%" style:font-name="Arial" fo:font-size="12pt"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9">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ice generale</text:p>
          </text:index-title>
          <text:p text:style-name="P1"><text:a xlink:type="simple" xlink:href="#__RefHeading___Toc727_1907326898" office:name="Preparazione applicativo" text:style-name="Index_20_Link" text:visited-style-name="Index_20_Link">Preparazione applicativo<text:tab/>3</text:a></text:p>
          <text:p text:style-name="P2"><text:a xlink:type="simple" xlink:href="#__RefHeading___Toc757_1907326898" office:name="Avvio del programma" text:style-name="Index_20_Link" text:visited-style-name="Index_20_Link">Avvio del programma<text:tab/>3</text:a></text:p>
          <text:p text:style-name="P3"><text:a xlink:type="simple" xlink:href="#__RefHeading___Toc759_1907326898" office:name="Installazione" text:style-name="Index_20_Link" text:visited-style-name="Index_20_Link">Installazione<text:tab/>3</text:a></text:p>
          <text:p text:style-name="P3"><text:a xlink:type="simple" xlink:href="#__RefHeading___Toc761_1907326898" office:name="Utilizzo del programma" text:style-name="Index_20_Link" text:visited-style-name="Index_20_Link">Utilizzo del programma<text:tab/>3</text:a></text:p>
          <text:p text:style-name="P3"><text:a xlink:type="simple" xlink:href="#__RefHeading___Toc763_1907326898" office:name="Utenti preconfigurati" text:style-name="Index_20_Link" text:visited-style-name="Index_20_Link">Utenti preconfigurati<text:tab/>3</text:a></text:p>
          <text:p text:style-name="P3"><text:a xlink:type="simple" xlink:href="#__RefHeading___Toc765_1907326898" office:name="Consigli d'uso" text:style-name="Index_20_Link" text:visited-style-name="Index_20_Link">Consigli d'uso<text:tab/>4</text:a></text:p>
          <text:p text:style-name="P3"><text:a xlink:type="simple" xlink:href="#__RefHeading___Toc1189_2748980313" office:name="Dati di esempio" text:style-name="Index_20_Link" text:visited-style-name="Index_20_Link">Dati di esempio<text:tab/>4</text:a></text:p>
          <text:p text:style-name="P2"><text:a xlink:type="simple" xlink:href="#__RefHeading___Toc729_1907326898" office:name="Operazioni preliminari" text:style-name="Index_20_Link" text:visited-style-name="Index_20_Link">Operazioni preliminari<text:tab/>4</text:a></text:p>
          <text:p text:style-name="P3"><text:a xlink:type="simple" xlink:href="#__RefHeading___Toc731_1907326898" office:name="Importazione preaccreditamento" text:style-name="Index_20_Link" text:visited-style-name="Index_20_Link">Importazione preaccreditamento<text:tab/>4</text:a></text:p>
          <text:p text:style-name="P3"><text:a xlink:type="simple" xlink:href="#__RefHeading___Toc733_1907326898" office:name="Predisposizione moduli di accreditamento" text:style-name="Index_20_Link" text:visited-style-name="Index_20_Link">Predisposizione moduli di accreditamento<text:tab/>4</text:a></text:p>
          <text:p text:style-name="P3"><text:a xlink:type="simple" xlink:href="#__RefHeading___Toc735_1907326898" office:name="Impostazione dati intervento" text:style-name="Index_20_Link" text:visited-style-name="Index_20_Link">Impostazione dati intervento<text:tab/>4</text:a></text:p>
          <text:p text:style-name="P3"><text:a xlink:type="simple" xlink:href="#__RefHeading___Toc737_1907326898" office:name="Definizione servizi" text:style-name="Index_20_Link" text:visited-style-name="Index_20_Link">Definizione servizi<text:tab/>5</text:a></text:p>
          <text:p text:style-name="P3"><text:a xlink:type="simple" xlink:href="#__RefHeading___Toc1402_2046632185" office:name="Utilizzo mappa servizi Google" text:style-name="Index_20_Link" text:visited-style-name="Index_20_Link">Utilizzo mappa servizi Google<text:tab/>5</text:a></text:p>
          <text:p text:style-name="P1"><text:a xlink:type="simple" xlink:href="#__RefHeading___Toc739_1907326898" office:name="Nozioni di base sull'utilizzo" text:style-name="Index_20_Link" text:visited-style-name="Index_20_Link">Nozioni di base sull'utilizzo<text:tab/>5</text:a></text:p>
          <text:p text:style-name="P2"><text:a xlink:type="simple" xlink:href="#__RefHeading___Toc128_474057684" office:name="Struttura delle pagine" text:style-name="Index_20_Link" text:visited-style-name="Index_20_Link">Struttura delle pagine<text:tab/>6</text:a></text:p>
          <text:p text:style-name="P3"><text:a xlink:type="simple" xlink:href="#__RefHeading___Toc130_474057684" office:name="Menu" text:style-name="Index_20_Link" text:visited-style-name="Index_20_Link">Menu<text:tab/>6</text:a></text:p>
          <text:p text:style-name="P3"><text:a xlink:type="simple" xlink:href="#__RefHeading___Toc132_474057684" office:name="Tabelle dati" text:style-name="Index_20_Link" text:visited-style-name="Index_20_Link">Tabelle dati<text:tab/>6</text:a></text:p>
          <text:p text:style-name="P3"><text:a xlink:type="simple" xlink:href="#__RefHeading___Toc134_474057684" office:name="Esportazione dati" text:style-name="Index_20_Link" text:visited-style-name="Index_20_Link">Esportazione dati<text:tab/>8</text:a></text:p>
          <text:p text:style-name="P2"><text:a xlink:type="simple" xlink:href="#__RefHeading___Toc741_1907326898" office:name="Funzionalità schede dati" text:style-name="Index_20_Link" text:visited-style-name="Index_20_Link">Funzionalità schede dati<text:tab/>8</text:a></text:p>
          <text:p text:style-name="P3"><text:a xlink:type="simple" xlink:href="#__RefHeading___Toc743_1907326898" office:name="Modifica in tabella" text:style-name="Index_20_Link" text:visited-style-name="Index_20_Link">Modifica in tabella<text:tab/>9</text:a></text:p>
          <text:p text:style-name="P3"><text:a xlink:type="simple" xlink:href="#__RefHeading___Toc745_1907326898" office:name="Filtri" text:style-name="Index_20_Link" text:visited-style-name="Index_20_Link">Filtri<text:tab/>9</text:a></text:p>
          <text:p text:style-name="P3"><text:a xlink:type="simple" xlink:href="#__RefHeading___Toc747_1907326898" office:name="Esportazione dati e modelli" text:style-name="Index_20_Link" text:visited-style-name="Index_20_Link">Esportazione dati e modelli<text:tab/>10</text:a></text:p>
          <text:p text:style-name="P3"><text:a xlink:type="simple" xlink:href="#__RefHeading___Toc749_1907326898" office:name="Importazione dati" text:style-name="Index_20_Link" text:visited-style-name="Index_20_Link">Importazione dati<text:tab/>10</text:a></text:p>
          <text:p text:style-name="P1"><text:a xlink:type="simple" xlink:href="#__RefHeading___Toc1948_2744434376" office:name="Gestione risorse" text:style-name="Index_20_Link" text:visited-style-name="Index_20_Link">Gestione risorse<text:tab/>10</text:a></text:p>
          <text:p text:style-name="P2"><text:a xlink:type="simple" xlink:href="#__RefHeading___Toc1952_2744434376" office:name="CHECK-IN MASSIVO (Registrazione rapida risorse)" text:style-name="Index_20_Link" text:visited-style-name="Index_20_Link">CHECK-IN MASSIVO (Registrazione rapida risorse)<text:tab/>11</text:a></text:p>
          <text:p text:style-name="P2"><text:a xlink:type="simple" xlink:href="#__RefHeading___Toc1954_2744434376" office:name="STATO ORGANIZZAZIONE (Monitoraggio situazione)" text:style-name="Index_20_Link" text:visited-style-name="Index_20_Link">STATO ORGANIZZAZIONE (Monitoraggio situazione)<text:tab/>11</text:a></text:p>
          <text:p text:style-name="P2"><text:a xlink:type="simple" xlink:href="#__RefHeading___Toc1956_2744434376" office:name="CHECK-OUT MASSIVO (Uscita risorse)" text:style-name="Index_20_Link" text:visited-style-name="Index_20_Link">CHECK-OUT MASSIVO (Uscita risorse)<text:tab/>11</text:a></text:p>
          <text:p text:style-name="P2"><text:a xlink:type="simple" xlink:href="#__RefHeading___GOR_2744434376" office:name="GESTIONE OPERATIVA RISORSE (Kanban board)" text:style-name="Index_20_Link" text:visited-style-name="Index_20_Link">GESTIONE OPERATIVA RISORSE (Kanban board)<text:tab/>12</text:a></text:p>
          <text:p text:style-name="P2"><text:a xlink:type="simple" xlink:href="#__RefHeading___SM_2744434376" office:name="GESTIONE SERVIZI" text:style-name="Index_20_Link" text:visited-style-name="Index_20_Link">GESTIONE SERVIZI<text:tab/>12</text:a></text:p>
          <text:p text:style-name="P2"><text:a xlink:type="simple" xlink:href="#__RefHeading___Toc1958_2744434376" office:name="Significato degli stati" text:style-name="Index_20_Link" text:visited-style-name="Index_20_Link">Significato degli stati<text:tab/>13</text:a></text:p>
          <text:p text:style-name="P1"><text:a xlink:type="simple" xlink:href="#__RefHeading___Toc140_474057684" office:name="Principali procedure operative" text:style-name="Index_20_Link" text:visited-style-name="Index_20_Link">Principali procedure operative<text:tab/>13</text:a></text:p>
          <text:p text:style-name="P2"><text:a xlink:type="simple" xlink:href="#__RefHeading___Toc142_474057684" office:name="P01. STAMPA MODULI ACCREDITAMENTO" text:style-name="Index_20_Link" text:visited-style-name="Index_20_Link">P01. STAMPA MODULI ACCREDITAMENTO<text:tab/>13</text:a></text:p>
          <text:p text:style-name="P2"><text:a xlink:type="simple" xlink:href="#__RefHeading___Toc144_474057684" office:name="P02. REGISTRAZIONE VOLONTARI" text:style-name="Index_20_Link" text:visited-style-name="Index_20_Link">P02. REGISTRAZIONE VOLONTARI<text:tab/>13</text:a></text:p>
          <text:p text:style-name="P2"><text:a xlink:type="simple" xlink:href="#__RefHeading___Toc146_474057684" office:name="P03. REGISTRAZIONE MEZZI" text:style-name="Index_20_Link" text:visited-style-name="Index_20_Link">P03. REGISTRAZIONE MEZZI<text:tab/>14</text:a></text:p>
          <text:p text:style-name="P2"><text:a xlink:type="simple" xlink:href="#__RefHeading___Toc148_474057684" office:name="P04. REGISTRAZIONE MATERIALI" text:style-name="Index_20_Link" text:visited-style-name="Index_20_Link">P04. REGISTRAZIONE MATERIALI<text:tab/>14</text:a></text:p>
          <text:p text:style-name="P2"><text:a xlink:type="simple" xlink:href="#__RefHeading___Toc150_474057684" office:name="P05. ASSEGNAZIONE SERVIZI A VOLONTARI/MEZZI/MATERIALI" text:style-name="Index_20_Link" text:visited-style-name="Index_20_Link">P05. ASSEGNAZIONE SERVIZI A VOLONTARI/MEZZI/MATERIALI<text:tab/>14</text:a></text:p>
          <text:p text:style-name="P2"><text:a xlink:type="simple" xlink:href="#__RefHeading___Toc152_474057684" office:name="P06. CHIUSURA TURNO SQUADRE" text:style-name="Index_20_Link" text:visited-style-name="Index_20_Link">P06. CHIUSURA TURNO SQUADRE<text:tab/>14</text:a></text:p>
          <text:p text:style-name="P2"><text:a xlink:type="simple" xlink:href="#__RefHeading___Toc156_474057684" office:name="P07. REGISTRAZIONE OPERATORI" text:style-name="Index_20_Link" text:visited-style-name="Index_20_Link">P07. REGISTRAZIONE OPERATORI<text:tab/>15</text:a></text:p>
          <text:p text:style-name="P2"><text:a xlink:type="simple" xlink:href="#__RefHeading___Toc158_474057684" office:name="P08. STAMPA BADGE VOLONTARI E MEZZI" text:style-name="Index_20_Link" text:visited-style-name="Index_20_Link">P08. STAMPA BADGE VOLONTARI E MEZZI<text:tab/>15</text:a></text:p>
          <text:p text:style-name="P2"><text:a xlink:type="simple" xlink:href="#__RefHeading___Toc160_474057684" office:name="P09. CENSIMENTO STRUTTURE" text:style-name="Index_20_Link" text:visited-style-name="Index_20_Link">P09. CENSIMENTO STRUTTURE<text:tab/>15</text:a></text:p>
          <text:p text:style-name="P2"><text:a xlink:type="simple" xlink:href="#__RefHeading___Toc162_474057684" office:name="P10. REGISTRAZIONE OSPITI" text:style-name="Index_20_Link" text:visited-style-name="Index_20_Link">P10. REGISTRAZIONE OSPITI<text:tab/>15</text:a></text:p>
          <text:p text:style-name="P2"><text:a xlink:type="simple" xlink:href="#__RefHeading___Toc164_474057684" office:name="P11. STAMPA BADGE OSPITI/ESTERNI/VISITATORI" text:style-name="Index_20_Link" text:visited-style-name="Index_20_Link">P11. STAMPA BADGE OSPITI/ESTERNI/VISITATORI<text:tab/>16</text:a></text:p>
          <text:p text:style-name="P2"><text:a xlink:type="simple" xlink:href="#__RefHeading___Toc166_474057684" office:name="P12. RUBRICA" text:style-name="Index_20_Link" text:visited-style-name="Index_20_Link">P12. RUBRICA<text:tab/>16</text:a></text:p>
          <text:p text:style-name="P2"><text:a xlink:type="simple" xlink:href="#__RefHeading___Toc168_474057684" office:name="P13. TRACCIAMENTO RICHIESTE" text:style-name="Index_20_Link" text:visited-style-name="Index_20_Link">P13. TRACCIAMENTO RICHIESTE<text:tab/>16</text:a></text:p>
          <text:p text:style-name="P2"><text:a xlink:type="simple" xlink:href="#__RefHeading___Toc170_474057684" office:name="P14. PROTOCOLLO" text:style-name="Index_20_Link" text:visited-style-name="Index_20_Link">P14. PROTOCOLLO<text:tab/>16</text:a></text:p>
          <text:p text:style-name="P2"><text:a xlink:type="simple" xlink:href="#__RefHeading___Toc172_474057684" office:name="P15. BACHECA AVVISI" text:style-name="Index_20_Link" text:visited-style-name="Index_20_Link">P15. BACHECA AVVISI<text:tab/>16</text:a></text:p>
          <text:p text:style-name="P2"><text:a xlink:type="simple" xlink:href="#__RefHeading___Toc174_474057684" office:name="P16. CONSEGNA RADIO" text:style-name="Index_20_Link" text:visited-style-name="Index_20_Link">P16. CONSEGNA RADIO<text:tab/>16</text:a></text:p>
          <text:p text:style-name="P2"><text:a xlink:type="simple" xlink:href="#__RefHeading___Toc176_474057684" office:name="P17. SEGNALAZIONE DANNEGGIAMENTO MEZZO/ATTREZZATURA" text:style-name="Index_20_Link" text:visited-style-name="Index_20_Link">P17. SEGNALAZIONE DANNEGGIAMENTO MEZZO/ATTREZZATURA<text:tab/>16</text:a></text:p>
          <text:p text:style-name="P2"><text:a xlink:type="simple" xlink:href="#__RefHeading___Toc190_474057684" office:name="P18. BACKUP DATI" text:style-name="Index_20_Link" text:visited-style-name="Index_20_Link">P18. BACKUP DATI<text:tab/>17</text:a></text:p>
          <text:p text:style-name="P2"><text:a xlink:type="simple" xlink:href="#__RefHeading___Toc180_474057684" office:name="P19. STIME PASTI" text:style-name="Index_20_Link" text:visited-style-name="Index_20_Link">P19. STIME PASTI<text:tab/>17</text:a></text:p>
          <text:p text:style-name="P2"><text:a xlink:type="simple" xlink:href="#__RefHeading___Toc182_474057684" office:name="P20. REGISTRAZIONE NUMERO PASTI" text:style-name="Index_20_Link" text:visited-style-name="Index_20_Link"><text:soft-page-break/>P20. REGISTRAZIONE NUMERO PASTI<text:tab/>17</text:a></text:p>
          <text:p text:style-name="P2"><text:a xlink:type="simple" xlink:href="#__RefHeading___Toc184_474057684" office:name="P21. BROGLIACCIO" text:style-name="Index_20_Link" text:visited-style-name="Index_20_Link">P21. BROGLIACCIO<text:tab/>17</text:a></text:p>
          <text:p text:style-name="P2"><text:a xlink:type="simple" xlink:href="#__RefHeading___Toc186_474057684" office:name="P22. REPORT OPERATIVO GIORNALIERO" text:style-name="Index_20_Link" text:visited-style-name="Index_20_Link">P22. REPORT OPERATIVO GIORNALIERO<text:tab/>17</text:a></text:p>
          <text:p text:style-name="P2"><text:a xlink:type="simple" xlink:href="#__RefHeading___Toc188_474057684" office:name="P23. REPORT" text:style-name="Index_20_Link" text:visited-style-name="Index_20_Link">P23. REPORT<text:tab/>17</text:a></text:p>
          <text:p text:style-name="P2"><text:a xlink:type="simple" xlink:href="#__RefHeading___Toc1259_1326959477" office:name="P24. CONTROLLO DATI" text:style-name="Index_20_Link" text:visited-style-name="Index_20_Link">P24. CONTROLLO DATI<text:tab/>18</text:a></text:p>
        </text:index-body>
      </text:table-of-content>
      <text:h text:style-name="P4" text:outline-level="1" loext:marker-style-name="T1"/>
      <text:h text:style-name="P5" text:outline-level="1" loext:marker-style-name="T1"><text:bookmark text:name="Copia_di_preparazione_applicativo_1"/><text:bookmark-start text:name="__RefHeading___Toc727_1907326898"/><text:span text:style-name="T1">Preparazione applicativo</text:span><text:bookmark-end text:name="__RefHeading___Toc727_1907326898"/><text:span text:style-name="T1"/></text:h>
      <text:p text:style-name="P6"><text:a xlink:type="simple" xlink:href="https://www.protezionet.it/" text:style-name="Internet_20_link" text:visited-style-name="Visited_20_Internet_20_Link"><text:span text:style-name="Internet_20_link"><text:span text:style-name="T2">Scaricare l'ultima versione del programma da https://www.protezionet.it</text:span></text:span></text:a><text:span text:style-name="T3"> e compiere le operazioni preliminari.</text:span></text:p>
      <text:h text:style-name="P7" text:outline-level="2" loext:marker-style-name="T1"><text:bookmark text:name="avvio_del_programma"/><text:bookmark-start text:name="__RefHeading___Toc757_1907326898"/><text:span text:style-name="T1">Avvio del programma</text:span><text:bookmark-end text:name="__RefHeading___Toc757_1907326898"/><text:span text:style-name="T1"/></text:h>
      <text:h text:style-name="P8" text:outline-level="3" loext:marker-style-name="T1"><text:bookmark text:name="installazione"/><text:bookmark-start text:name="__RefHeading___Toc759_1907326898"/><text:span text:style-name="T1">Installazione</text:span><text:bookmark-end text:name="__RefHeading___Toc759_1907326898"/><text:span text:style-name="T1"/></text:h>
      <text:p text:style-name="P6" loext:marker-style-name="T3"><text:span text:style-name="T3">Non è necessaria l'installazione del programma, è sufficiente seguire le seguenti istruzioni.</text:span><text:span text:style-name="T3"/></text:p>
      <text:list text:style-name="WWNum2">
        <text:list-item>
          <text:p text:style-name="P9" loext:marker-style-name="T4"><text:span text:style-name="T3">Scarica l'ultima versione del programma disponibile su </text:span><text:a xlink:type="simple" xlink:href="https://www.protezionet.it/" text:style-name="Internet_20_link" text:visited-style-name="Visited_20_Internet_20_Link"><text:span text:style-name="Internet_20_link"><text:span text:style-name="T3">https://www.protezionet.it</text:span></text:span></text:a><text:span text:style-name="T3">. Il file ha estensione .zip (cartella compressa).</text:span></text:p>
        </text:list-item>
        <text:list-item>
          <text:p text:style-name="P9" loext:marker-style-name="T3"><text:span text:style-name="T3">Scompatta il file in una cartella a piacere. Sono necessari circa 140 MB di spazio libero su disco per la cartella scompattata.</text:span><text:span text:style-name="T3"/></text:p>
        </text:list-item>
        <text:list-item>
          <text:p text:style-name="P9" loext:marker-style-name="T3"><text:span text:style-name="T3">Apri la cartella scelta al punto precedente e fai doppio click su </text:span><text:span text:style-name="T5">avvia_server.bat</text:span><text:span text:style-name="T3">.</text:span></text:p>
        </text:list-item>
        <text:list-item>
          <text:p text:style-name="P9" loext:marker-style-name="T3"><text:span text:style-name="T3">Verrà aperto il programma per la navigazione Internet di default (es. Microsoft Edge o Google Chrome) alla pagina di autenticazione.</text:span><text:span text:style-name="T3"/></text:p>
        </text:list-item>
        <text:list-item>
          <text:p text:style-name="P9" loext:marker-style-name="T3"><text:span text:style-name="T3">Prendi nota dell'indirizzo impostato nella barra degli indirizzi (servirà per accedere il programma da altre postazioni nella stessa rete).</text:span><text:span text:style-name="T3"/></text:p>
        </text:list-item>
      </text:list>
      <text:p text:style-name="P10" loext:marker-style-name="T3"/>
      <text:h text:style-name="P8" text:outline-level="3" loext:marker-style-name="T1"><text:bookmark text:name="utilizzo_del_programma"/><text:bookmark-start text:name="__RefHeading___Toc761_1907326898"/><text:span text:style-name="T1">Utilizzo del programma</text:span><text:bookmark-end text:name="__RefHeading___Toc761_1907326898"/><text:span text:style-name="T1"/></text:h>
      <text:p text:style-name="P6" loext:marker-style-name="T3"><text:span text:style-name="T3">Il programma è un'applicazione Web. Questo vuol dire che per utilizzarla occorre un browser per la navigazione Internet, come Microsoft Edge, Google Chrome o Mozilla Firefox.</text:span><text:span text:style-name="T3"/></text:p>
      <text:p text:style-name="P6" loext:marker-style-name="T3"><text:span text:style-name="T3">Per utilizzare il programma il browser si deve collegare al server che hai avviato sul tuo computer cliccando su </text:span><text:span text:style-name="T6">avvia_server.bat</text:span><text:span text:style-name="T3">.</text:span></text:p>
      <text:p text:style-name="P6" loext:marker-style-name="T3"><text:span text:style-name="T3">Se per errore chiudi il browser, il server continuerà a funzionare e potrai accedere nuovamente al programma mettendo nella barra degli indirizzi di Microsoft Edge (o di un altro browser Web) l'indirizzo del punto 5, oppure cliccando nuovamente su </text:span><text:span text:style-name="T6">avvia_server.bat</text:span><text:span text:style-name="T3"> (operazione sconsigliata).</text:span></text:p>
      <text:p text:style-name="P6" loext:marker-style-name="T3"><text:span text:style-name="T3">Per arrestare il server basta avviare il file </text:span><text:span text:style-name="T6">ferma_server.bat</text:span><text:span text:style-name="T3"> nella cartella del punto 2.</text:span></text:p>
      <text:h text:style-name="P8" text:outline-level="3" loext:marker-style-name="T1"><text:bookmark text:name="utenti_preconfigurati"/><text:bookmark-start text:name="__RefHeading___Toc763_1907326898"/><text:span text:style-name="T1">Utenti preconfigurati</text:span><text:bookmark-end text:name="__RefHeading___Toc763_1907326898"/><text:span text:style-name="T1"/></text:h>
      <text:p text:style-name="P6" loext:marker-style-name="T3"><text:span text:style-name="T3">Per accedere al programma occorre sempre specificare un nome utente ed una password. Questo perché il programma può essere utilizzato, anche contemporaneamente, da più utenti.</text:span><text:span text:style-name="T3"/></text:p>
      <text:p text:style-name="P6" loext:marker-style-name="T3"><text:span text:style-name="T3">Ci sono due differenti tipologie di utenti:</text:span><text:span text:style-name="T3"/></text:p>
      <text:list text:style-name="WWNum3">
        <text:list-item>
          <text:p text:style-name="P11" loext:marker-style-name="T3"><text:span text:style-name="T3">utente “normale” (predefinito);</text:span><text:span text:style-name="T3"/></text:p>
        </text:list-item>
        <text:list-item>
          <text:p text:style-name="P11" loext:marker-style-name="T3"><text:span text:style-name="T3">utente amministratore.</text:span><text:span text:style-name="T3"/></text:p>
        </text:list-item>
      </text:list>
      <text:p text:style-name="P12" loext:marker-style-name="T1"/>
      <text:p text:style-name="P6" loext:marker-style-name="T3"><text:span text:style-name="T3">Ecco l'elenco degli utenti preconfigurati per l'accesso al programma.</text:span><text:span text:style-name="T3"/></text:p>
      <text:list text:style-name="WWNum4">
        <text:list-item>
          <text:p text:style-name="P13" loext:marker-style-name="T3"><text:span text:style-name="T3">Nome utente: oper1, password: </text:span><text:span text:style-name="T6">oper1</text:span></text:p>
        </text:list-item>
        <text:list-item>
          <text:p text:style-name="P13" loext:marker-style-name="T3"><text:soft-page-break/><text:span text:style-name="T3">Nome utente: admin1, password: </text:span><text:span text:style-name="T6">admin1</text:span><text:span text:style-name="T3"> (Utente amministratore)</text:span></text:p>
        </text:list-item>
      </text:list>
      <text:p text:style-name="P6" loext:marker-style-name="T3"><text:span text:style-name="T3"><text:line-break/>Le principali funzionalità concesse agli amministratori sono le seguenti.</text:span><text:span text:style-name="T3"/></text:p>
      <text:list text:style-name="WWNum5">
        <text:list-item>
          <text:p text:style-name="P14" loext:marker-style-name="T3"><text:span text:style-name="T3">Importare elenchi da file Excel (es. caricamento banche dati preesistenti)</text:span><text:span text:style-name="T3"/></text:p>
        </text:list-item>
        <text:list-item>
          <text:p text:style-name="P14" loext:marker-style-name="T3"><text:span text:style-name="T3">Modificare struttura schede dati (es. creare nuovi campi)</text:span><text:span text:style-name="T3"/></text:p>
        </text:list-item>
        <text:list-item>
          <text:p text:style-name="P14" loext:marker-style-name="T3"><text:span text:style-name="T3">Aggiornare dati non modificabili dagli operatori (es. data ora uscita definitiva)</text:span><text:span text:style-name="T3"/></text:p>
        </text:list-item>
        <text:list-item>
          <text:p text:style-name="P14" loext:marker-style-name="T3"><text:span text:style-name="T3">Eliminare tutti i dati presenti dalle schede (es. riportando il programma alla versione “iniziale” al termine dell'evento)</text:span><text:span text:style-name="T3"/></text:p>
        </text:list-item>
      </text:list>
      <text:p text:style-name="P10" loext:marker-style-name="T3"/>
      <text:h text:style-name="P8" text:outline-level="3" loext:marker-style-name="T1"><text:bookmark text:name="consigli_d_uso"/><text:bookmark-start text:name="__RefHeading___Toc765_1907326898"/><text:span text:style-name="T1">Consigli d'uso</text:span><text:bookmark-end text:name="__RefHeading___Toc765_1907326898"/><text:span text:style-name="T1"/></text:h>
      <text:p text:style-name="P6" loext:marker-style-name="T3"><text:span text:style-name="T3">Normalmente non è necessario - anzi, è sconsigliato - utilizzare l'utente amministratore se non per effettuare operazioni particolari.</text:span><text:span text:style-name="T3"/></text:p>
      <text:p text:style-name="P6" loext:marker-style-name="T3"><text:span text:style-name="T3">Ogni utente, al primo accesso, deve modificare la propria password cliccando su Preferenze in alto a destra, e successivamente su CAMBIA PASSWORD DI ACCESSO.</text:span><text:span text:style-name="T3"/></text:p>
      <text:p text:style-name="P6" loext:marker-style-name="T3"><text:span text:style-name="T3">Ogni utente, terminata la sessione di lavoro, deve uscire dal programma cliccando su Esci, sempre in alto a destra.</text:span><text:span text:style-name="T3"/></text:p>
      <text:h text:style-name="P8" text:outline-level="3" loext:marker-style-name="T1"><text:bookmark-start text:name="__RefHeading___Toc1189_2748980313"/><text:span text:style-name="T1">Dati di esempio</text:span><text:bookmark-end text:name="__RefHeading___Toc1189_2748980313"/><text:span text:style-name="T1"/></text:h>
      <text:p text:style-name="P6" loext:marker-style-name="T4"><text:span text:style-name="T3">Sono direttamente all’interno del programma in PAGINA INIZIALE / AIUTO.</text:span><text:span text:style-name="T4"/></text:p>
      <text:p text:style-name="P15" loext:marker-style-name="T1"/>
      <text:h text:style-name="P7" text:outline-level="2" loext:marker-style-name="T1"><text:bookmark-start text:name="__RefHeading___Toc729_1907326898"/><text:span text:style-name="T1">Operazioni preliminari</text:span><text:bookmark-end text:name="__RefHeading___Toc729_1907326898"/><text:span text:style-name="T1"/></text:h>
      <text:h text:style-name="P8" text:outline-level="3" loext:marker-style-name="T1"><text:bookmark text:name="importazione_risorse_attese"/><text:bookmark-start text:name="__RefHeading___Toc731_1907326898"/><text:span text:style-name="T1">Importazione preaccreditamento</text:span><text:bookmark-end text:name="__RefHeading___Toc731_1907326898"/><text:span text:style-name="T1"/></text:h>
      <text:p text:style-name="P6" loext:marker-style-name="T3"><text:span text:style-name="T3">Se è stata prevista una fase di preaccreditamento, è possibile precaricare nelle RISORSE ATTESE i dati di volontari, mezzi, materiali ed operatori accreditati per l'evento.</text:span><text:span text:style-name="T3"/></text:p>
      <text:p text:style-name="P6" loext:marker-style-name="T3"><text:span text:style-name="T3">È possibile importare i dati utilizzando un file Excel. Una volta esportate in Excel le schede VOLONTARI/MEZZI/MATERIALI PREACCREDITATI,è possibile utilizzarle per inserire i dati e successivamente procedere con l'importazione dei dati. </text:span><text:span text:style-name="T3"/></text:p>
      <text:h text:style-name="P8" text:outline-level="3" loext:marker-style-name="T1"><text:bookmark text:name="predisposizione_moduli_di_accreditamento"/><text:bookmark-start text:name="__RefHeading___Toc733_1907326898"/><text:span text:style-name="T1">Predisposizione moduli di accreditamento</text:span><text:bookmark-end text:name="__RefHeading___Toc733_1907326898"/><text:span text:style-name="T1"/></text:h>
      <text:p text:style-name="P6" loext:marker-style-name="T3"><text:span text:style-name="T3">Una volta importati i dati nelle risorse attese, è possibile generare i moduli di accreditamento.</text:span><text:span text:style-name="T3"/></text:p>
      <text:p text:style-name="P6" loext:marker-style-name="T3"><text:span text:style-name="T3">Alcuni moduli di accreditamento (es. volontari e mezzi) contengono dei codici a barre che consentono di velocizzare le operazioni di registrazione.</text:span><text:span text:style-name="T3"/></text:p>
      <text:h text:style-name="P8" text:outline-level="3" loext:marker-style-name="T1"><text:bookmark text:name="impostazione_dati_intervento"/><text:bookmark-start text:name="__RefHeading___Toc735_1907326898"/><text:span text:style-name="T1">Impostazione dati intervento</text:span><text:bookmark-end text:name="__RefHeading___Toc735_1907326898"/><text:span text:style-name="T1"/></text:h>
      <text:p text:style-name="P6" loext:marker-style-name="T3"><text:span text:style-name="T3">Cliccando sul pulsante Informazioni intervento (PAGINA INIZIALE / CONFIGURAZIONE) è possibile impostare le informazioni relative all'intervento. Le informazioni inserite consentiranno a tutte le funzionalità di lavorare correttamente (es. generazione modelli).</text:span><text:span text:style-name="T3"/></text:p>
      <text:p text:style-name="P6" loext:marker-style-name="T3"><text:span text:style-name="T3">Tramite il pulsante “Carica loghi” è possibile caricare loghi aggiuntivi che potranno essere utilizzati nei modelli. Dopo il caricamento di un logo occorre andare un PAGINA INIZIALE / </text:span><text:soft-page-break/><text:span text:style-name="T3">CONFIGURAZIONE / Informazioni intervento ed indicare il nome del file nel menu a tendina dei campo logo e logo 2. Infine cliccare su Aggiorna.</text:span><text:span text:style-name="T3"/></text:p>
      <text:p text:style-name="P6" loext:marker-style-name="T3"><text:span text:style-name="T3">Al momento sono supportati 2 loghi:</text:span><text:span text:style-name="T3"/></text:p>
      <text:list text:style-name="WWNum6">
        <text:list-item>
          <text:p text:style-name="P16" loext:marker-style-name="T3"><text:span text:style-name="T7">logo</text:span><text:span text:style-name="T3">: immagine quadrata (es 300×300 pixel) utilizzata per l'intestazione di tutti i modelli;</text:span></text:p>
        </text:list-item>
        <text:list-item>
          <text:p text:style-name="P16" loext:marker-style-name="T3"><text:span text:style-name="T7">logo2</text:span><text:span text:style-name="T3">: immagine rettangolare con larghezza doppia rispetto all'altezza, utilizzata solo in alcuni modelli (es. attestati).</text:span></text:p>
        </text:list-item>
      </text:list>
      <text:p text:style-name="P6" loext:marker-style-name="T3"><text:span text:style-name="T3"><text:line-break/>I loghi devono essere caricati in formato JPG. Si consiglia di caricare immagini di dimensioni non eccessive (al di sotto dei 200 KB).</text:span><text:span text:style-name="T3"/></text:p>
      <text:h text:style-name="P8" text:outline-level="3" loext:marker-style-name="T1"><text:bookmark text:name="definizione_servizi"/><text:bookmark-start text:name="__RefHeading___Toc737_1907326898"/><text:span text:style-name="T1">Definizione servizi</text:span><text:bookmark-end text:name="__RefHeading___Toc737_1907326898"/><text:span text:style-name="T1"/></text:h>
      <text:p text:style-name="P6" loext:marker-style-name="T3"><text:span text:style-name="T3">È consigliabile definire l'elenco di servizi che durante l'intervento verranno assegnati alle risorse.</text:span><text:span text:style-name="T3"/></text:p>
      <text:p text:style-name="P6" loext:marker-style-name="T3"><text:span text:style-name="T3">Nella sezione PAGINA INIZIALE / AIUTO è possibile caricare file Excel con elenco di servizi di esempio.</text:span><text:span text:style-name="T3"/></text:p>
      <text:p text:style-name="P17" loext:marker-style-name="T1"><text:span text:style-name="T1">Attenzione! I servizi IN ATTESA DI SERVIZIO e USCITA DEFINITIVA devono essere presenti per un funzionamento corretto dell'applicativo.</text:span><text:span text:style-name="T1"/></text:p>
      <text:h text:style-name="P8" text:outline-level="3" loext:marker-style-name="T1"><text:bookmark-start text:name="__RefHeading___Toc1402_2046632185"/><text:bookmark-start text:name="Copia_di___RefHeading___Toc737_190732689"/><text:span text:style-name="T1">Utilizzo mappa servizi</text:span><text:bookmark-end text:name="Copia_di___RefHeading___Toc737_190732689"/><text:span text:style-name="T1"> Google</text:span><text:bookmark-end text:name="__RefHeading___Toc1402_2046632185"/><text:span text:style-name="T1"/></text:h>
      <text:p text:style-name="P17" loext:marker-style-name="T8"><text:span text:style-name="T8">Per attivare ed utilizzare la mappa Google presente in PAGINA INIZIALE / MAPPE è necessario inserire in </text:span><text:span text:style-name="T9">PAGINA INIZIALE / CONFIGURAZIONE / DATI INTERVENTO il codice dell’apposita chiave API Google nel campo “Chiave mappa Google”. </text:span></text:p>
      <text:p text:style-name="P17" loext:marker-style-name="T9"><text:span text:style-name="T9">Inoltre il dispositivo dovrà avere una connessione Internet attiva per poter fruire della mappa interattiva.</text:span><text:span text:style-name="T9"/></text:p>
      <text:p text:style-name="P17" loext:marker-style-name="T8"><text:span text:style-name="T9">La chiave API di Google deve autorizzare il sito Web http://localhost/* e le API da abilitare sono almeno le seguenti:</text:span><text:span text:style-name="T9"/></text:p>
      <text:list text:style-name="WWNum7">
        <text:list-item>
          <text:p text:style-name="P18" loext:marker-style-name="T9"><text:span text:style-name="T9">Geocoding API</text:span><text:span text:style-name="T9"/></text:p>
        </text:list-item>
        <text:list-item>
          <text:p text:style-name="P18" loext:marker-style-name="T9"><text:span text:style-name="T9">Geolocation API</text:span><text:span text:style-name="T9"/></text:p>
        </text:list-item>
        <text:list-item>
          <text:p text:style-name="P18" loext:marker-style-name="T9"><text:span text:style-name="T9">Maps JavaScript API</text:span><text:span text:style-name="T9"/></text:p>
        </text:list-item>
        <text:list-item>
          <text:p text:style-name="P18" loext:marker-style-name="T9"><text:span text:style-name="T9">Places API</text:span><text:span text:style-name="T9"/></text:p>
        </text:list-item>
      </text:list>
      <text:h text:style-name="P19" text:outline-level="1" loext:marker-style-name="T1"><text:bookmark text:name="Copia_di_nozioni_di_base_sull_utilizzo_1"/><text:bookmark-start text:name="__RefHeading___Toc739_1907326898"/><text:span text:style-name="T1">Nozioni di base sull'utilizzo</text:span><text:bookmark-end text:name="__RefHeading___Toc739_1907326898"/><text:span text:style-name="T1"/></text:h>
      <text:p text:style-name="P17" loext:marker-style-name="T1"><text:span text:style-name="T1">Leggere le nozioni di base sulle caratteristiche dell'applicativo</text:span><text:span text:style-name="T1"/></text:p>
      <text:list text:style-name="WWNum8">
        <text:list-item>
          <text:p text:style-name="P20" loext:marker-style-name="T1"><text:span text:style-name="T1">Struttura delle pagine</text:span><text:span text:style-name="T1"/></text:p>
        </text:list-item>
        <text:list-item>
          <text:p text:style-name="P20" loext:marker-style-name="T1"><text:span text:style-name="T1">Funzionalità base</text:span><text:span text:style-name="T1"/></text:p>
        </text:list-item>
      </text:list>
      <text:h text:style-name="P7" text:outline-level="2" loext:marker-style-name="T1"><text:bookmark text:name="struttura_delle_pagine"/><text:bookmark-start text:name="__RefHeading___Toc128_474057684"/><text:soft-page-break/><text:span text:style-name="T1">Struttura delle pagine</text:span><text:bookmark-end text:name="__RefHeading___Toc128_474057684"/><text:span text:style-name="T1"/></text:h>
      <text:h text:style-name="P8" text:outline-level="3" loext:marker-style-name="T1"><text:bookmark text:name="menu"/><text:bookmark-start text:name="__RefHeading___Toc130_474057684"/><text:span text:style-name="T1">Menu</text:span><text:bookmark-end text:name="__RefHeading___Toc130_474057684"/><text:span text:style-name="T1"/></text:h>
      <text:p text:style-name="P6" loext:marker-style-name="T3"><text:span text:style-name="T3">In alto a destra è visibile il nominativo dell'operatore al lavoro in quella determinata sessione, es. OPER 1.</text:span><text:span text:style-name="T3"/></text:p>
      <text:p text:style-name="P6" loext:marker-style-name="T3"><draw:frame draw:style-name="fr1" draw:name="Immagine1" text:anchor-type="as-char" svg:width="16.792cm" svg:height="1.148cm" draw:z-index="0"><draw:image xlink:href="Pictures/100000000000049400000050444C9887.png" xlink:type="simple" xlink:show="embed" xlink:actuate="onLoad" draw:mime-type="image/png"/></draw:frame></text:p>
      <text:p text:style-name="P6" loext:marker-style-name="T10"><text:span text:style-name="T9">Il pulsante PREFERENZE permette di cambiare la password di accesso degli </text:span><text:span text:style-name="T11">utenti preconfigurati</text:span><text:span text:style-name="T9">. Tramite lo stesso tasto si possono modificare tipo e dimensione dei caratteri utilizzati nell'applicativo.</text:span></text:p>
      <text:p text:style-name="P6" loext:marker-style-name="T3"><text:span text:style-name="T3">Di fianco al nome dell'applicazione (“Segreteria Campo”) appare la barra dei menu. Dove sono presenti sotto menu, a fianco del nome è visibile una freccina verso il basso.</text:span><text:span text:style-name="T3"/></text:p>
      <text:p text:style-name="P6" loext:marker-style-name="T3"><text:span text:style-name="T3">Sotto la barra dei menu è presente la barra di navigazione, che indica in quale area o scheda dati si sta lavorando.</text:span><text:span text:style-name="T3"/></text:p>
      <text:p text:style-name="P6" loext:marker-style-name="T3"><draw:frame draw:style-name="fr1" draw:name="Immagine2" text:anchor-type="as-char" svg:width="8.176cm" svg:height="0.557cm" draw:z-index="1"><draw:image xlink:href="Pictures/100000000000013500000015D2F2730F.png" xlink:type="simple" xlink:show="embed" xlink:actuate="onLoad" draw:mime-type="image/png"/></draw:frame><text:span text:style-name="T3"><text:line-break/><text:line-break/>Le voci cliccabili consentono di accedere direttamente ad altre aree o schede dati senza utilizzare la barra menu principale.</text:span></text:p>
      <text:h text:style-name="P8" text:outline-level="3" loext:marker-style-name="T1"><text:bookmark text:name="tabelle_dati"/><text:bookmark-start text:name="__RefHeading___Toc132_474057684"/><text:span text:style-name="T1">Tabelle dati</text:span><text:bookmark-end text:name="__RefHeading___Toc132_474057684"/><text:span text:style-name="T1"/></text:h>
      <text:p text:style-name="P6" loext:marker-style-name="T10"><text:span text:style-name="T9">La maggior parte dei menu consentono di accedere alle </text:span><text:span text:style-name="T11">schede dati</text:span><text:span text:style-name="T9">.</text:span></text:p>
      <text:p text:style-name="P6" loext:marker-style-name="T3"><text:span text:style-name="T3">Selezionando ad esempio la scheda dati VOLONTARI si accede all'elenco di tutti i volontari registrati per l'evento in corso, anche quelli che hanno terminato il proprio servizio.</text:span><text:span text:style-name="T3"/></text:p>
      <text:p text:style-name="P6"><draw:frame draw:style-name="fr1" draw:name="Immagine3" text:anchor-type="as-char" svg:width="15.653cm" svg:height="3.002cm" draw:z-index="2"><draw:image xlink:href="Pictures/100000000000036C000000A8FD16444E.png" xlink:type="simple" xlink:show="embed" xlink:actuate="onLoad" draw:mime-type="image/png"/></draw:frame><text:span text:style-name="T3"><text:line-break/></text:span></text:p>
      <text:p text:style-name="P6"><text:span text:style-name="T3">Cliccando su VOLONTARI IN SERVIZIO viene visualizzato invece solo il personale presente e disponibile al campo. Le tre caselle bianche </text:span><text:span text:style-name="T9">(</text:span><text:span text:style-name="T11">filtri</text:span><text:span text:style-name="T9">) </text:span><text:span text:style-name="T3">permettono l'estrazione di dati specifici dagli elenchi presenti nell'applicativo. I “filtri” seguono una logica simile a quella di Excel. Ad esempio, se si vogliono visualizzare quanti e quali Volontari appartenenti ad una specifica Organizzazione hanno operato al campo, si andrà a selezionare nella prima casella la voce “ORGANIZZAZIONE”, nella seconda “CONTIENE” e nella terza si inserirà il nome dell'organizzazione. Basterà digitare anche solo una parte del nome completo dell'organizzazione ed apparirà un “aiutino” riportante il nominativo registrato.</text:span></text:p>
      <text:p text:style-name="P6" loext:marker-style-name="T12"><text:soft-page-break/><draw:frame draw:style-name="fr1" draw:name="Immagine4" text:anchor-type="as-char" svg:width="17.11cm" svg:height="3.819cm" draw:z-index="3"><draw:image xlink:href="Pictures/1000000000000365000000C2ADD32A9E.png" xlink:type="simple" xlink:show="embed" xlink:actuate="onLoad" draw:mime-type="image/png"/></draw:frame></text:p>
      <text:p text:style-name="P6" loext:marker-style-name="T3"><text:span text:style-name="T3">Questa modalità di ricerca è fruibile in tutte le schede dati, ovviamente con le sole voci presenti nella scheda dati. Ad esempio, se la ricerca è relativa ad un mezzo (scheda dati MEZZI), nella prima tendina non ci saranno le voci COGNOME, NOME, ORGANIZZAZIONE, ecc… ma TARGA, MARCA E MODELLO, ORGANIZZAZIONE, ecc.</text:span><text:span text:style-name="T3"/></text:p>
      <text:p text:style-name="P6" loext:marker-style-name="T3"><text:span text:style-name="T3">E' possibile ordinare i dati delle tabelle in base al valore contenuto in una colonna. E' sufficiente cliccando sull'intestazione della colonna.</text:span><text:span text:style-name="T3"/></text:p>
      <text:p text:style-name="P6" loext:marker-style-name="T12"><draw:frame draw:style-name="fr1" draw:name="Immagine5" text:anchor-type="as-char" svg:width="15.93cm" svg:height="10.583cm" draw:z-index="4"><draw:image xlink:href="Pictures/100000000000025A0000019064165E9A.png" xlink:type="simple" xlink:show="embed" xlink:actuate="onLoad" draw:mime-type="image/png"/></draw:frame></text:p>
      <text:p text:style-name="P6" loext:marker-style-name="T3"><text:span text:style-name="T3">Sopra e sotto ogni tabella compare una barra con dei pulsanti.</text:span><text:span text:style-name="T3"/></text:p>
      <text:p text:style-name="P6" loext:marker-style-name="T3"><draw:frame draw:style-name="fr1" draw:name="Immagine6" text:anchor-type="as-char" svg:width="16.969cm" svg:height="1.161cm" draw:z-index="5"><draw:image xlink:href="Pictures/100000000000034200000039C8AF743C.png" xlink:type="simple" xlink:show="embed" xlink:actuate="onLoad" draw:mime-type="image/png"/></draw:frame></text:p>
      <text:list text:style-name="WWNum9">
        <text:list-item>
          <text:p text:style-name="P21" loext:marker-style-name="T3"><text:span text:style-name="T3">Pagina …/…: identifica il numero di pagina corrente, se i dati sono stati suddivisi in più pagine</text:span><text:span text:style-name="T3"/></text:p>
        </text:list-item>
        <text:list-item>
          <text:p text:style-name="P21" loext:marker-style-name="T3"><text:span text:style-name="T3">TUTTE LE PAGINE (… RIGHE): in presenza di un elenco suddiviso in più con più pagine, visualizza l'elenco completo in una sola pagina</text:span><text:span text:style-name="T3"/></text:p>
        </text:list-item>
        <text:list-item>
          <text:p text:style-name="P21" loext:marker-style-name="T3"><text:span text:style-name="T3">La voce (…RIGHE) riporta il numero di righe di dati presenti nella scheda dati. Ad ogni riga corrisponde un'entità (es. volontario/mezzo/attrezzatura/ospite) censita </text:span><text:soft-page-break/><text:span text:style-name="T3">nella scheda. Es. nella scheda dati VOLONTARI “(4 RIGHE)” indica che sono stati registrati 4 volontari.</text:span><text:span text:style-name="T3"/></text:p>
        </text:list-item>
        <text:list-item>
          <text:p text:style-name="P21" loext:marker-style-name="T3"><text:span text:style-name="T3">OPZIONI/RIMUOVI COLONNE: consente di scegliere le colonne da visualizzare nella tabella. Ad esempio, sempre nella scheda VOLONTARI, selezionando solo NOME, COGNOME e CELLULARE e confermando con il tastino OK, verranno visualizzate solo quelle 3 colonne.</text:span><text:span text:style-name="T3"/></text:p>
        </text:list-item>
      </text:list>
      <text:p text:style-name="P22" loext:marker-style-name="T3"><draw:frame draw:style-name="fr1" draw:name="Immagine7" text:anchor-type="as-char" svg:width="12.649cm" svg:height="15.057cm" draw:z-index="6"><draw:image xlink:href="Pictures/10000000000001DE0000023995C74AA4.png" xlink:type="simple" xlink:show="embed" xlink:actuate="onLoad" draw:mime-type="image/png"/></draw:frame></text:p>
      <text:p text:style-name="P23" loext:marker-style-name="T3"/>
      <text:list text:style-name="WWNum10">
        <text:list-item>
          <text:p text:style-name="P24" loext:marker-style-name="T3"><text:span text:style-name="T3">APPLICA MODELLO: permette di applicare alla scheda dati modelli precaricati, ad esempio per stampare l'attestato di presenza dei Volontari.</text:span><text:span text:style-name="T3"/></text:p>
        </text:list-item>
      </text:list>
      <text:h text:style-name="P8" text:outline-level="3" loext:marker-style-name="T1"><text:bookmark text:name="esportazione_dati"/><text:bookmark-start text:name="__RefHeading___Toc134_474057684"/><text:span text:style-name="T1">Esportazione dati</text:span><text:bookmark-end text:name="__RefHeading___Toc134_474057684"/><text:span text:style-name="T1"/></text:h>
      <text:p text:style-name="P6" loext:marker-style-name="T10"><text:span text:style-name="T9">In fondo alla pagina compare una serie di opzioni che consente l'</text:span><text:span text:style-name="T11">esportazione dei dati in uno o più formati</text:span><text:span text:style-name="T9">.</text:span></text:p>
      <text:h text:style-name="P7" text:outline-level="2" loext:marker-style-name="T1"><text:bookmark text:name="funzionalita_schede_dati"/><text:bookmark-start text:name="__RefHeading___Toc741_1907326898"/><text:span text:style-name="T1">Funzionalità schede dati</text:span><text:bookmark-end text:name="__RefHeading___Toc741_1907326898"/><text:span text:style-name="T1"/></text:h>
      <text:p text:style-name="P6"><text:span text:style-name="T3">Il programma è costituito da una serie di </text:span><text:span text:style-name="Emphasis"><text:span text:style-name="T3">schede dati </text:span></text:span><text:span text:style-name="T3">con funzionalità comuni.</text:span></text:p>
      <text:p text:style-name="P6"><text:span text:style-name="T3">Una </text:span><text:span text:style-name="Emphasis"><text:span text:style-name="T3">scheda dati </text:span></text:span><text:span text:style-name="T3">è paragonabile ad un foglio di lavoro di un </text:span><text:a xlink:type="simple" xlink:href="https://it.wikipedia.org/wiki/Foglio_elettronico" text:style-name="Internet_20_link" text:visited-style-name="Visited_20_Internet_20_Link"><text:span text:style-name="Internet_20_link">foglio di calcolo</text:span></text:a><text:span text:style-name="T2"> </text:span><text:span text:style-name="T3">(es. Microsoft Excel).</text:span></text:p>
      <text:p text:style-name="P6"><text:soft-page-break/><text:span text:style-name="T3">I dati possono essere inseriti nella scheda dati cliccando su </text:span><text:span text:style-name="Strong_20_Emphasis"><text:span text:style-name="T13">INSERISCI NUOVO</text:span></text:span><text:span text:style-name="T3">. Apparirà una scheda in cui potranno essere inseriti i dati previsti per quella scheda dati.</text:span></text:p>
      <text:p text:style-name="P6" loext:marker-style-name="T12"><draw:frame draw:style-name="fr1" draw:name="Immagine8" text:anchor-type="as-char" svg:width="15.401cm" svg:height="11.591cm" draw:z-index="7"><draw:image xlink:href="Pictures/1000000100000246000001B68D2530BE.png" xlink:type="simple" xlink:show="embed" xlink:actuate="onLoad" draw:mime-type="image/png"/><svg:desc> Esempio inserimento dati</svg:desc></draw:frame></text:p>
      <text:p text:style-name="P6"><text:span text:style-name="T3">Per la modifica dei dati, è sufficiente cliccare sul pulsante </text:span><text:span text:style-name="Strong_20_Emphasis"><text:span text:style-name="T13">SCHEDA</text:span></text:span><text:span text:style-name="T3"> disponibile su ogni riga.</text:span></text:p>
      <text:p text:style-name="P6" loext:marker-style-name="T12"><draw:frame draw:style-name="fr1" draw:name="Immagine9" text:anchor-type="as-char" svg:width="16.722cm" svg:height="1.168cm" draw:z-index="8"><draw:image xlink:href="Pictures/10000001000003C0000000431AB4EBE9.png" xlink:type="simple" xlink:show="embed" xlink:actuate="onLoad" draw:mime-type="image/png"/><svg:desc> Riga in una scheda dati</svg:desc></draw:frame></text:p>
      <text:p text:style-name="P6"><text:span text:style-name="T3">Analogamente, cliccando su </text:span><text:span text:style-name="Strong_20_Emphasis"><text:span text:style-name="T13">Elimina</text:span></text:span><text:span text:style-name="T3">, la riga potrà essere cancellata dal database.</text:span></text:p>
      <text:p text:style-name="P6" loext:marker-style-name="T3"><text:span text:style-name="T3">Le funzionalità comuni a tutte le schede dati sono le seguenti.</text:span><text:span text:style-name="T3"/></text:p>
      <text:h text:style-name="P8" text:outline-level="3" loext:marker-style-name="T1"><text:bookmark text:name="modifica_in_tabella"/><text:bookmark-start text:name="__RefHeading___Toc743_1907326898"/><text:span text:style-name="T1">Modifica in tabella</text:span><text:bookmark-end text:name="__RefHeading___Toc743_1907326898"/><text:span text:style-name="T1"/></text:h>
      <text:p text:style-name="P6" loext:marker-style-name="T3"><text:span text:style-name="T3">I dati contenuti nelle schede dati possono essere anche modificati cliccando direttamente sui valori contenuti nelle celle.</text:span><text:span text:style-name="T3"/></text:p>
      <text:p text:style-name="P6" loext:marker-style-name="T12"><draw:frame draw:style-name="fr1" draw:name="Immagine10" text:anchor-type="as-char" svg:width="16.651cm" svg:height="2.651cm" draw:z-index="9"><draw:image xlink:href="Pictures/10000001000002B90000006F2919D0E0.png" xlink:type="simple" xlink:show="embed" xlink:actuate="onLoad" draw:mime-type="image/png"/><svg:desc> Esempio modifica in riga</svg:desc></draw:frame></text:p>
      <text:h text:style-name="P8" text:outline-level="3" loext:marker-style-name="T1"><text:bookmark text:name="filtri"/><text:bookmark-start text:name="__RefHeading___Toc745_1907326898"/><text:span text:style-name="T1">Filtri</text:span><text:bookmark-end text:name="__RefHeading___Toc745_1907326898"/><text:span text:style-name="T1"/></text:h>
      <text:p text:style-name="P6" loext:marker-style-name="T3"><text:span text:style-name="T3">Sopra ogni tabella che mostra i contenuti della scheda dati c'è una sezione che permette di filtrare le informazioni visualizzate.</text:span><text:span text:style-name="T3"/></text:p>
      <text:p text:style-name="P6" loext:marker-style-name="T12"><text:soft-page-break/><draw:frame draw:style-name="fr1" draw:name="Immagine11" text:anchor-type="as-char" svg:width="17.004cm" svg:height="2.468cm" draw:z-index="10"><draw:image xlink:href="Pictures/1000000100000372000000806A84298C.png" xlink:type="simple" xlink:show="embed" xlink:actuate="onLoad" draw:mime-type="image/png"/><svg:desc> Barra del filtro</svg:desc></draw:frame></text:p>
      <text:p text:style-name="P6" loext:marker-style-name="T3"><text:span text:style-name="T3">Uno o più campi delle schede dati posso essere usati come filtri.</text:span><text:span text:style-name="T3"/></text:p>
      <text:p text:style-name="P6"><text:span text:style-name="T3">Una volta scelto il campo su cui applicare il filtro, la tipologia di filtro (</text:span><text:span text:style-name="Emphasis"><text:span text:style-name="T3">contiene</text:span></text:span><text:span text:style-name="T3">, </text:span><text:span text:style-name="Emphasis"><text:span text:style-name="T3">uguale a</text:span></text:span><text:span text:style-name="T3">, </text:span><text:span text:style-name="Emphasis"><text:span text:style-name="T3">maggiore di</text:span></text:span><text:span text:style-name="T3">, ecc…) e il valore da considerare, cliccando su “</text:span><text:span text:style-name="Emphasis"><text:span text:style-name="T3">Filtra i dati” </text:span></text:span><text:span text:style-name="T3">verranno mostrati solo le righe che soddisfano i criteri scelti.</text:span></text:p>
      <text:p text:style-name="P6" loext:marker-style-name="T3"><text:span text:style-name="T3">Esistono tipologie speciali di filtri.</text:span><text:span text:style-name="T3"/></text:p>
      <text:list text:style-name="WWNum11">
        <text:list-item>
          <text:p text:style-name="P25"><text:span text:style-name="Strong_20_Emphasis"><text:span text:style-name="T13">(raggruppa per campo selezionato)</text:span></text:span><text:span text:style-name="T3">. Permette di raggruppare i dati in base ai valori del campo selezionato. Per ogni valore differente verrà anche mostrato il numero di volte che compare. Raggruppando la scheda dati volontari per il campo organizzazione, ad esempio, è possibile conteggiare il numero di volontari per organizzazione.</text:span></text:p>
        </text:list-item>
        <text:list-item>
          <text:p text:style-name="P25"><text:span text:style-name="Strong_20_Emphasis"><text:span text:style-name="T13">(mostra solo contrassegnati come speciali) </text:span></text:span><text:span text:style-name="T3">e </text:span><text:span text:style-name="Strong_20_Emphasis"><text:span text:style-name="T13">(nascondi contrassegnati come speciali)</text:span></text:span><text:span text:style-name="T3"> mostrano e nascondono rispettivamente le righe contrassegnate come speciali, ovvero contrassegnate con la “stellina”.</text:span></text:p>
        </text:list-item>
        <text:list-item>
          <text:p text:style-name="P25"><text:span text:style-name="Strong_20_Emphasis"><text:span text:style-name="T13">(mostra solo selezionati) </text:span></text:span><text:span text:style-name="T3">e </text:span><text:span text:style-name="Strong_20_Emphasis"><text:span text:style-name="T13">(nascondi selezionati) </text:span></text:span><text:span text:style-name="T3">mostrano e nascondono rispettivamente le righe contrassegnate come selezionate, ovvero contrassegnate con la “spunta”.</text:span></text:p>
        </text:list-item>
      </text:list>
      <text:h text:style-name="P8" text:outline-level="3" loext:marker-style-name="T1"><text:bookmark text:name="esportazione_dati_e_modelli"/><text:bookmark-start text:name="__RefHeading___Toc747_1907326898"/><text:span text:style-name="T1">Esportazione dati e modelli</text:span><text:bookmark-end text:name="__RefHeading___Toc747_1907326898"/><text:span text:style-name="T1"/></text:h>
      <text:p text:style-name="P6" loext:marker-style-name="T3"><text:span text:style-name="T3">I dati possono essere esportati in diversi formati. Attualmente sono supportati.</text:span><text:span text:style-name="T3"/></text:p>
      <text:list text:style-name="WWNum12">
        <text:list-item>
          <text:p text:style-name="P26" loext:marker-style-name="T3"><text:span text:style-name="T3">XLSX (MS Excel)</text:span><text:span text:style-name="T3"/></text:p>
        </text:list-item>
        <text:list-item>
          <text:p text:style-name="P26" loext:marker-style-name="T3"><text:span text:style-name="T3">ODS (Open/LibreOffice)</text:span><text:span text:style-name="T3"/></text:p>
        </text:list-item>
        <text:list-item>
          <text:p text:style-name="P26" loext:marker-style-name="T3"><text:span text:style-name="T3">PDF (Acrobat Reader)</text:span><text:span text:style-name="T3"/></text:p>
        </text:list-item>
        <text:list-item>
          <text:p text:style-name="P26" loext:marker-style-name="T3"><text:span text:style-name="T3">RTF (MS Word e OpenOffice.org Writer, LibreOffice…)</text:span><text:span text:style-name="T3"/></text:p>
        </text:list-item>
        <text:list-item>
          <text:p text:style-name="P26" loext:marker-style-name="T3"><text:span text:style-name="T3">HTML (versione stampabile)</text:span><text:span text:style-name="T3"/></text:p>
        </text:list-item>
      </text:list>
      <text:p text:style-name="P23" loext:marker-style-name="T3"/>
      <text:p text:style-name="P6" loext:marker-style-name="T3"><text:span text:style-name="T3">Ai dati possono essere applicati anche dei modelli specifici per la generazione di file PDF per usi particolari, come badge con codice a barre ed attestati.</text:span><text:span text:style-name="T3"/></text:p>
      <text:h text:style-name="P8" text:outline-level="3" loext:marker-style-name="T1"><text:bookmark text:name="importazione_dati"/><text:bookmark-start text:name="__RefHeading___Toc749_1907326898"/><text:span text:style-name="T1">Importazione dati</text:span><text:bookmark-end text:name="__RefHeading___Toc749_1907326898"/><text:span text:style-name="T1"/></text:h>
      <text:p text:style-name="P6" loext:marker-style-name="T3"><text:span text:style-name="T3">Tramite la funzione IMPORTA DATI è possibile inserire il contenuto di un file Excel in una scheda dati. La prima riga del file Excel dovrà contenere le intestazioni delle colonne. Queste ultime dovranno coincidere con il nome dei campi corrispondenti all'interno della scheda dati.</text:span><text:span text:style-name="T3"/></text:p>
      <text:h text:style-name="P19" text:outline-level="1" loext:marker-style-name="T1"><text:bookmark-start text:name="__RefHeading___Toc1948_2744434376"/><text:span text:style-name="T1">Gestione risorse</text:span><text:bookmark-end text:name="__RefHeading___Toc1948_2744434376"/><text:span text:style-name="T1"/></text:h>
      <text:p text:style-name="P27"><text:bookmark-start text:name="__RefHeading___Toc1950_2744434376"/>Le applicazioni di Check-in massivo, Stato organizzazione e Check-out massivo permettono di gestire in modo rapido e centralizzato le risorse operative (volontari, mezzi e attrezzature) durante eventi, esercitazioni o emergenze.<text:bookmark-end text:name="__RefHeading___Toc1950_2744434376"/></text:p>
      <text:p text:style-name="P27"><text:soft-page-break/>Il sistema è progettato per ridurre i tempi di registrazione, evitare duplicazioni di dati, mantenere una visione aggiornata della situazione operativa e semplificare le procedure di ingresso e uscita delle organizzazioni.</text:p>
      <text:p text:style-name="P6" loext:marker-style-name="T3"><text:span text:style-name="T3">Flusso tipico:</text:span><text:span text:style-name="T3"/></text:p>
      <text:p text:style-name="P6" loext:marker-style-name="T3"><text:span text:style-name="T3"><text:s text:c="4"/>• Check-in massivo → registrazione arrivo risorse</text:span><text:span text:style-name="T3"/></text:p>
      <text:p text:style-name="P6" loext:marker-style-name="T3"><text:span text:style-name="T3"><text:s text:c="4"/>• Stato organizzazione → monitoraggio situazione</text:span><text:span text:style-name="T3"/></text:p>
      <text:p text:style-name="P6" loext:marker-style-name="T3"><text:span text:style-name="T3"><text:s text:c="4"/>• Gestione operativa risorse (kanban) → assegnazione servizi e spostamenti in tempo reale</text:span><text:span text:style-name="T3"/></text:p>
      <text:p text:style-name="P6" loext:marker-style-name="T3"><text:span text:style-name="T3"><text:s text:c="4"/>• Check-out massivo → registrazione uscita</text:span><text:span text:style-name="T3"/></text:p>
      <text:h text:style-name="P28" text:outline-level="2"><text:bookmark-start text:name="__RefHeading___Toc1952_2744434376"/>CHECK-IN MASSIVO (Registrazione rapida risorse)<text:bookmark-end text:name="__RefHeading___Toc1952_2744434376"/></text:h>
      <text:p text:style-name="P6" loext:marker-style-name="T3"><text:span text:style-name="T3">Questa applicazione consente di registrare contemporaneamente più volontari, mezzi e attrezzature appartenenti a una organizzazione.</text:span><text:span text:style-name="T3"/></text:p>
      <text:p text:style-name="P6" loext:marker-style-name="T3"><text:span text:style-name="T3">Procedura operativa:</text:span><text:span text:style-name="T3"/></text:p>
      <text:p text:style-name="P6" loext:marker-style-name="T3"><text:span text:style-name="T3"><text:s text:c="4"/>• Selezione organizzazione</text:span><text:span text:style-name="T3"/></text:p>
      <text:p text:style-name="P6" loext:marker-style-name="T3"><text:span text:style-name="T3"><text:s text:c="4"/>• Selezione volontari</text:span><text:span text:style-name="T3"/></text:p>
      <text:p text:style-name="P6" loext:marker-style-name="T3"><text:span text:style-name="T3"><text:s text:c="4"/>• Selezione mezzi</text:span><text:span text:style-name="T3"/></text:p>
      <text:p text:style-name="P6" loext:marker-style-name="T3"><text:span text:style-name="T3"><text:s text:c="4"/>• Selezione attrezzature</text:span><text:span text:style-name="T3"/></text:p>
      <text:p text:style-name="P6" loext:marker-style-name="T3"><text:span text:style-name="T3"><text:s text:c="4"/>• Conferma inserimento</text:span><text:span text:style-name="T3"/></text:p>
      <text:p text:style-name="P6" loext:marker-style-name="T3"><text:span text:style-name="T3">Il sistema verifica se le risorse sono già registrate, evita duplicazioni e inserisce solo i nuovi record.</text:span><text:span text:style-name="T3"/></text:p>
      <text:h text:style-name="P28" text:outline-level="2"><text:bookmark-start text:name="__RefHeading___Toc1954_2744434376"/>STATO ORGANIZZAZIONE (Monitoraggio situazione)<text:bookmark-end text:name="__RefHeading___Toc1954_2744434376"/></text:h>
      <text:p text:style-name="P6" loext:marker-style-name="T3"><text:span text:style-name="T3">Permette di visualizzare in tempo reale la situazione operativa di una organizzazione.</text:span><text:span text:style-name="T3"/></text:p>
      <text:p text:style-name="P6" loext:marker-style-name="T3"><text:span text:style-name="T3"><text:s text:c="4"/>• Volontari in servizio / non in servizio</text:span><text:span text:style-name="T3"/></text:p>
      <text:p text:style-name="P6" loext:marker-style-name="T3"><text:span text:style-name="T3"><text:s text:c="4"/>• Mezzi in servizio / non in servizio</text:span><text:span text:style-name="T3"/></text:p>
      <text:p text:style-name="P6" loext:marker-style-name="T3"><text:span text:style-name="T3"><text:s text:c="4"/>• Attrezzature in servizio / non in servizio</text:span><text:span text:style-name="T3"/></text:p>
      <text:p text:style-name="P6" loext:marker-style-name="T3"><text:span text:style-name="T3"><text:s text:c="4"/>• Servizio assegnato e date attestato</text:span><text:span text:style-name="T3"/></text:p>
      <text:p text:style-name="P6" loext:marker-style-name="T3"><text:span text:style-name="T3"><text:s text:c="4"/>• Ricerca nelle tabelle</text:span><text:span text:style-name="T3"/></text:p>
      <text:h text:style-name="P28" text:outline-level="2"><text:bookmark-start text:name="__RefHeading___Toc1956_2744434376"/>CHECK-OUT MASSIVO (Uscita risorse)<text:bookmark-end text:name="__RefHeading___Toc1956_2744434376"/></text:h>
      <text:p text:style-name="P6" loext:marker-style-name="T3"><text:span text:style-name="T3">Consente di registrare l’uscita definitiva di più risorse contemporaneamente quando una squadra termina l’attività.</text:span><text:span text:style-name="T3"/></text:p>
      <text:p text:style-name="P6" loext:marker-style-name="T3"><text:span text:style-name="T3"><text:s text:c="4"/>• Selezionare organizzazione</text:span><text:span text:style-name="T3"/></text:p>
      <text:p text:style-name="P6" loext:marker-style-name="T3"><text:span text:style-name="T3"><text:s text:c="4"/>• Selezionare volontari</text:span><text:span text:style-name="T3"/></text:p>
      <text:p text:style-name="P6" loext:marker-style-name="T3"><text:soft-page-break/><text:span text:style-name="T3"><text:s text:c="4"/>• Selezionare mezzi</text:span><text:span text:style-name="T3"/></text:p>
      <text:p text:style-name="P6" loext:marker-style-name="T3"><text:span text:style-name="T3"><text:s text:c="4"/>• Selezionare attrezzature</text:span><text:span text:style-name="T3"/></text:p>
      <text:p text:style-name="P6" loext:marker-style-name="T3"><text:span text:style-name="T3"><text:s text:c="4"/>• Confermare uscita</text:span><text:span text:style-name="T3"/></text:p>
      <text:p text:style-name="P6" loext:marker-style-name="T3"><text:span text:style-name="T3">Il sistema imposta automaticamente servizio = USCITA DEFINITIVA, data fine attestato e data/ora uscita definitiva.</text:span><text:span text:style-name="T3"/></text:p>
      <text:h text:style-name="P28" text:outline-level="2"><text:bookmark-start text:name="__RefHeading___GOR_2744434376"/>GESTIONE OPERATIVA RISORSE (Kanban board)<text:bookmark-end text:name="__RefHeading___GOR_2744434376"/></text:h>
      <text:p text:style-name="P6" loext:marker-style-name="T14"><text:span text:style-name="T14">Permette di vedere e gestire in tempo reale la distribuzione di tutte le risorse attive (volontari, mezzi e materiali) tra i servizi operativi, tramite una tavola kanban. È accessibile da PAGINA INIZIALE / GESTIONE RISORSE.</text:span><text:span text:style-name="T14"/></text:p>
      <text:p text:style-name="P29" loext:marker-style-name="T14"><text:span text:style-name="T14">Funzionalità principali:</text:span><text:span text:style-name="T14"/></text:p>
      <text:p text:style-name="P30" loext:marker-style-name="T14"><text:span text:style-name="T14">Colonne kanban per servizio: ogni colonna rappresenta un servizio operativo; la prima colonna è sempre “IN ATTESA DI SERVIZIO”</text:span><text:span text:style-name="T14"/></text:p>
      <text:p text:style-name="P30" loext:marker-style-name="T14"><text:span text:style-name="T14">Card per gruppo: ogni card rappresenta un’organizzazione (o squadra) con i contatori di volontari, mezzi e materiali assegnati a quel servizio</text:span><text:span text:style-name="T14"/></text:p>
      <text:p text:style-name="P30" loext:marker-style-name="T14"><text:span text:style-name="T14">Drag &amp; drop: trascinare una card intera, un’intera categoria (volontari/mezzi/materiali) o una singola risorsa verso un’altra colonna per cambiarne il servizio</text:span><text:span text:style-name="T14"/></text:p>
      <text:p text:style-name="P30" loext:marker-style-name="T14"><text:span text:style-name="T14">Modali cambio servizio/squadra: pulsanti “Cambia servizio” e “Cambia squadra” su ogni card per operazioni massive con selezione dei tipi di risorsa</text:span><text:span text:style-name="T14"/></text:p>
      <text:p text:style-name="P30" loext:marker-style-name="T14"><text:span text:style-name="T14">Filtri: ricerca testuale, raggruppamento per organizzazione o squadra, filtro per provincia e organizzazione</text:span><text:span text:style-name="T14"/></text:p>
      <text:p text:style-name="P30" loext:marker-style-name="T14"><text:span text:style-name="T14">Storico movimenti: ogni spostamento viene registrato automaticamente in SERVIZI / MOV. RISORSE con data/ora, gruppo, risorsa e servizi di provenienza/destinazione</text:span><text:span text:style-name="T14"/></text:p>
      <text:h text:style-name="P28" text:outline-level="2"><text:bookmark-start text:name="__RefHeading___SM_2744434376"/>GESTIONE SERVIZI<text:bookmark-end text:name="__RefHeading___SM_2744434376"/></text:h>
      <text:p text:style-name="P6" loext:marker-style-name="T14"><text:span text:style-name="T14">Permette di creare, modificare, eliminare e riordinare i servizi operativi. È accessibile da PAGINA INIZIALE / CONFIGURAZIONE.</text:span><text:span text:style-name="T14"/></text:p>
      <text:p text:style-name="P29" loext:marker-style-name="T14"><text:span text:style-name="T14">Funzionalità principali:</text:span><text:span text:style-name="T14"/></text:p>
      <text:p text:style-name="P30" loext:marker-style-name="T14"><text:span text:style-name="T14">Lista e form laterale: elenco servizi a sinistra con pannello di modifica a destra; selezione immediata cliccando sulla riga</text:span><text:span text:style-name="T14"/></text:p>
      <text:p text:style-name="P30" loext:marker-style-name="T14"><text:span text:style-name="T14">Riordinamento drag &amp; drop: trascinare i servizi nella lista per modificarne l’ordine di visualizzazione nelle tendine</text:span><text:span text:style-name="T14"/></text:p>
      <text:p text:style-name="P30" loext:marker-style-name="T14"><text:span text:style-name="T14">Colore e lettera: ogni servizio può avere un colore identificativo e una lettera/simbolo per il marker sulla mappa</text:span><text:span text:style-name="T14"/></text:p>
      <text:p text:style-name="P30" loext:marker-style-name="T14"><text:span text:style-name="T14">Posizione geografica: selezione coordinate tramite mappa interattiva (OpenStreetMap) con ricerca indirizzo e reverse geocoding automatico di comune e provincia</text:span><text:span text:style-name="T14"/></text:p>
      <text:p text:style-name="P30" loext:marker-style-name="T14"><text:span text:style-name="T14">Date inizio/fine: campi data e ora con selettore integrato</text:span><text:span text:style-name="T14"/></text:p>
      <text:p text:style-name="P30" loext:marker-style-name="T14"><text:soft-page-break/><text:span text:style-name="T14">Protezione servizi obbligatori: “IN ATTESA DI SERVIZIO” e “USCITA DEFINITIVA” non possono essere eliminati né riordinati</text:span><text:span text:style-name="T14"/></text:p>
      <text:p text:style-name="P30" loext:marker-style-name="T14"><text:span text:style-name="T14">Strumenti: importazione massiva dei servizi dalle tabelle preaccreditati e accreditati, inserimento automatico dei servizi obbligatori, eliminazione massiva dei servizi non obbligatori</text:span><text:span text:style-name="T14"/></text:p>
      <text:h text:style-name="P28" text:outline-level="2"><text:bookmark-start text:name="__RefHeading___Toc1958_2744434376"/>Significato degli stati<text:bookmark-end text:name="__RefHeading___Toc1958_2744434376"/></text:h>
      <text:p text:style-name="P6" loext:marker-style-name="T3"><text:span text:style-name="T3"><text:s text:c="4"/>• In servizio → Risorsa presente e operativa</text:span><text:span text:style-name="T3"/></text:p>
      <text:p text:style-name="P6" loext:marker-style-name="T3"><text:span text:style-name="T3"><text:s text:c="4"/>• Non in servizio → Risorsa registrata ma uscita</text:span><text:span text:style-name="T3"/></text:p>
      <text:p text:style-name="P6" loext:marker-style-name="T3"><text:span text:style-name="T3"><text:s text:c="4"/>• Uscita definitiva → Risorsa ha terminato la partecipazione</text:span><text:span text:style-name="T3"/></text:p>
      <text:p text:style-name="P6" loext:marker-style-name="T3"><text:span text:style-name="T3"><text:s text:c="4"/>• Dati incompleti → Informazioni mancanti o incoerenti</text:span><text:span text:style-name="T3"/></text:p>
      <text:h text:style-name="P19" text:outline-level="1" loext:marker-style-name="T1"><text:bookmark text:name="principali_procedure_operative"/><text:bookmark-start text:name="__RefHeading___Toc140_474057684"/><text:span text:style-name="T1">Principali procedure operative</text:span><text:bookmark-end text:name="__RefHeading___Toc140_474057684"/><text:span text:style-name="T1"/></text:h>
      <text:h text:style-name="P7" text:outline-level="2" loext:marker-style-name="T1"><text:bookmark text:name="stampa_moduli_accreditamento"/><text:bookmark-start text:name="__RefHeading___Toc142_474057684"/><text:span text:style-name="T1">P01. STAMPA MODULI ACCREDITAMENTO</text:span><text:bookmark-end text:name="__RefHeading___Toc142_474057684"/><text:span text:style-name="T1"/></text:h>
      <text:p text:style-name="P6" loext:marker-style-name="T3"><text:span text:style-name="T3">Per la stampa dei moduli di accreditamento per mezzi e materiali, è possibile utilizzare le funzionalità contenute nella sezione PREACCREDITAMENTI della PAGINA INIZIALE.</text:span><text:span text:style-name="T3"/></text:p>
      <text:h text:style-name="P7" text:outline-level="2" loext:marker-style-name="T1"><text:bookmark text:name="registrazione_volontari"/><text:bookmark-start text:name="__RefHeading___Toc144_474057684"/><text:span text:style-name="T1">P02. REGISTRAZIONE VOLONTARI</text:span><text:bookmark-end text:name="__RefHeading___Toc144_474057684"/><text:span text:style-name="T1"/></text:h>
      <text:p text:style-name="P6" loext:marker-style-name="T3"><text:span text:style-name="T3">I volontari vanno registrati nella scheda RISORSE/VOLONTARI (pulsante INSERISCI NUOVO) oppure in PAGINA INIZIALE (pulsante REGISTRAZIONE VOLONTARI).</text:span><text:span text:style-name="T3"/></text:p>
      <text:p text:style-name="P6" loext:marker-style-name="T3"><text:span text:style-name="T3">Se è stata prevista una fase di caricamento del DATABASE VOLONTARI, sarà possibile beneficiare dei dati precaricati. Digitando infatti alcune lettere in alcuni dei campi “sensibili”, ad esempio nome, cognome e codice fiscale, verranno proposti dei suggerimenti che consentiranno di velocizzare l'inserimento dei dati.</text:span><text:span text:style-name="T3"/></text:p>
      <text:p text:style-name="P6" loext:marker-style-name="T3"><text:span text:style-name="T3">Sono obbligatori i campi organizzazione, cognome, nome, codice fiscale. Nel campo organizzazione inserire, in maiuscolo (si consiglia di utilizzare sempre il carattere maiuscolo in tutti i campi), il nome dell’organizzazione così come riportato sul tesserino regionale. Altre informazioni vanno compilate durante l'“intervista” al Volontario in arrivo o sulla base delle informazioni dichiarate nel modulo di accreditamento.</text:span><text:span text:style-name="T3"/></text:p>
      <text:p text:style-name="P6" loext:marker-style-name="T3"><text:span text:style-name="T3">Importante chiedere ed indicare:</text:span><text:span text:style-name="T3"/></text:p>
      <text:list text:style-name="WWNum13">
        <text:list-item>
          <text:p text:style-name="P31" loext:marker-style-name="T3"><text:span text:style-name="T3">se responsabile (caposquadra);</text:span><text:span text:style-name="T3"/></text:p>
        </text:list-item>
        <text:list-item>
          <text:p text:style-name="P31" loext:marker-style-name="T3"><text:span text:style-name="T3">recapito telefonico (cellulare) per i responsabili;</text:span><text:span text:style-name="T3"/></text:p>
        </text:list-item>
        <text:list-item>
          <text:p text:style-name="P31" loext:marker-style-name="T3"><text:span text:style-name="T3">se autista di uno dei mezzi in servizio;</text:span><text:span text:style-name="T3"/></text:p>
        </text:list-item>
        <text:list-item>
          <text:p text:style-name="P31" loext:marker-style-name="T3"><text:span text:style-name="T3">se intende usufruire dei “benefici di legge”;</text:span><text:span text:style-name="T3"/></text:p>
        </text:list-item>
        <text:list-item>
          <text:p text:style-name="P31" loext:marker-style-name="T3"><text:span text:style-name="T3">numero di giorni eventualmente richiesti per beneficiare dei benefici.</text:span><text:span text:style-name="T3"/></text:p>
        </text:list-item>
      </text:list>
      <text:p text:style-name="P6" loext:marker-style-name="T3"><text:span text:style-name="T3"><text:line-break/>Nel campo organizzazione inserire la stessa denominazione per tutti i volontari appartenenti allo stesso gruppo (es. il nome dell’organizzazione così come riportato sul tesserino regionale).</text:span><text:span text:style-name="T3"/></text:p>
      <text:p text:style-name="P6" loext:marker-style-name="T3"><text:soft-page-break/><text:span text:style-name="T3">Il codice badge, utilizzato per il codice a barre presente nei tesserini, viene assegnato in automatico, utilizzando il prefisso definito in CONFIGURAZIONE INIZIALE.</text:span><text:span text:style-name="T3"/></text:p>
      <text:h text:style-name="P7" text:outline-level="2" loext:marker-style-name="T1"><text:bookmark text:name="registrazione_mezzi"/><text:bookmark-start text:name="__RefHeading___Toc146_474057684"/><text:span text:style-name="T1">P03. REGISTRAZIONE MEZZI</text:span><text:bookmark-end text:name="__RefHeading___Toc146_474057684"/><text:span text:style-name="T1"/></text:h>
      <text:p text:style-name="P6" loext:marker-style-name="T3"><text:span text:style-name="T3">I mezzi vanno registrati nella scheda RISORSE/MEZZI (pulsante INSERISCI NUOVO) oppure in PAGINA INIZIALE (pulsante REGISTRAZIONE MEZZI).</text:span><text:span text:style-name="T3"/></text:p>
      <text:p text:style-name="P6" loext:marker-style-name="T3"><text:span text:style-name="T3">Obbligatori i campi organizzazione, marca e modello, targa, KM arrivo al campo.</text:span><text:span text:style-name="T3"/></text:p>
      <text:p text:style-name="P6" loext:marker-style-name="T3"><text:span text:style-name="T3">Nel campo organizzazione inserire, in maiuscolo, il nome dell’organizzazione così come riportato nei volontari registrati per il gruppo.</text:span><text:span text:style-name="T3"/></text:p>
      <text:h text:style-name="P7" text:outline-level="2" loext:marker-style-name="T1"><text:bookmark text:name="registrazione_attrezzature"/><text:bookmark-start text:name="__RefHeading___Toc148_474057684"/><text:span text:style-name="T1">P04. REGISTRAZIONE MATERIALI</text:span><text:bookmark-end text:name="__RefHeading___Toc148_474057684"/><text:span text:style-name="T1"/></text:h>
      <text:p text:style-name="P6" loext:marker-style-name="T3"><text:span text:style-name="T3">Procedura analoga a registrazione di Volontari e mezzi.</text:span><text:span text:style-name="T3"/></text:p>
      <text:h text:style-name="P7" text:outline-level="2" loext:marker-style-name="T1"><text:bookmark text:name="assegnazione_servizi_a_volontari_mezzi_a"/><text:bookmark-start text:name="__RefHeading___Toc150_474057684"/><text:span text:style-name="T1">P05. ASSEGNAZIONE SERVIZI A VOLONTARI/MEZZI/MATERIALI</text:span><text:bookmark-end text:name="__RefHeading___Toc150_474057684"/><text:span text:style-name="T1"/></text:h>
      <text:p text:style-name="P6" loext:marker-style-name="T3"><text:span text:style-name="T3">In PAGINA INIZIALE / GESTIONE RISORSE è disponibile la funzione “GESTIONE OPERATIVA RISORSE” (kanban board) che consente di assegnare e spostare i servizi di volontari, mezzi e materiali tramite drag &amp; drop o tramite le modali “Cambia servizio” e “Cambia squadra”. È possibile assegnare un SERVIZIO (es. CUCINA, SEGRETERIA, SCENARIO OPERATIVO, USCITA DEFINITIVA) alle risorse operative. Per le operazioni singole su una risorsa è disponibile l’icona di cambio servizio direttamente nella riga della risorsa espansa.</text:span><text:span text:style-name="T3"/></text:p>
      <text:p text:style-name="P6" loext:marker-style-name="T3"><text:span text:style-name="T3">La schermata per la movimentazione delle risorse permette di selezionare uno o più Volontari/mezzi/materiali ed il servizio da assegnare (tramite menu a tendina). Il sistema, dopo la conferma dell'utente, automaticamente aggiorna il campo “SERVIZIO” presente nelle schede di Volontari, mezzi e materiali.</text:span><text:span text:style-name="T3"/></text:p>
      <text:p text:style-name="P6" loext:marker-style-name="T3"><text:span text:style-name="T3">In SERVIZI/MOV. RISORSE è possibile visualizzare tutte le movimentazioni delle risorse registrate a sistema. Nello specifico, il sistema memorizza (con data/ora) ogni variazione del campo “SERVIZIO” di Volontari/mezzi/materiali. In questa pagina (tramite opportuni filtri) si potrà ricostruire la “vita operativa” della risorsa in quel dato intervento.</text:span><text:span text:style-name="T3"/></text:p>
      <text:p text:style-name="P6" loext:marker-style-name="T3"><text:span text:style-name="T3">Tutte le risorse accreditate vengono messe in automatico “IN ATTESA DI SERVIZIO” una volta registrate.</text:span><text:span text:style-name="T3"/></text:p>
      <text:p text:style-name="P6" loext:marker-style-name="T3"><text:span text:style-name="T3">I servizi possono essere precaricati oppure creati al momento in base alle necessità (scheda SERVIZI oppure PAGINA INIZIALE/ CONFIGURAZIONE/INTERVENTO/ELENCO SERVIZI). Il campo ORDINE determina l'ordine con cui viene presentato nelle tendine.</text:span><text:span text:style-name="T3"/></text:p>
      <text:p text:style-name="P6" loext:marker-style-name="T3"><text:span text:style-name="T3">E' possibile inoltre inserire le coordinate GPS (Lat./Long.) per poter visualizzare sulla mappa (PAGINA INIZIALE/REPORT/MAPPA SERVIZI) la posizione geografica del servizio (es. campo base, cantieri/scenari di servizio).</text:span><text:span text:style-name="T3"/></text:p>
      <text:h text:style-name="P7" text:outline-level="2" loext:marker-style-name="T1"><text:bookmark text:name="fine_turno_delle_squadre"/><text:bookmark-start text:name="__RefHeading___Toc152_474057684"/><text:span text:style-name="T1">P06. CHIUSURA TURNO SQUADRE</text:span><text:bookmark-end text:name="__RefHeading___Toc152_474057684"/><text:span text:style-name="T1"/></text:h>
      <text:p text:style-name="P6" loext:marker-style-name="T3"><text:span text:style-name="T3">Punti d’attenzione.</text:span><text:span text:style-name="T3"/></text:p>
      <text:list text:style-name="WWNum14">
        <text:list-item>
          <text:p text:style-name="P32" loext:marker-style-name="T3"><text:soft-page-break/><text:span text:style-name="T3">Rilevare ed inserire km alla partenza dei mezzi.</text:span><text:span text:style-name="T3"/></text:p>
        </text:list-item>
        <text:list-item>
          <text:p text:style-name="P32" loext:marker-style-name="T3"><text:span text:style-name="T3">Assegnare il servizio “USCITA DEFINITIVA” a volontari, mezzi e materiali.</text:span><text:span text:style-name="T3"/></text:p>
        </text:list-item>
        <text:list-item>
          <text:p text:style-name="P32" loext:marker-style-name="T3"><text:span text:style-name="T3">Verificare che MANSIONE, DATA INIZIO ATTESTATO e DATA FINE ATTESTATO siano compilati correttamente.</text:span><text:span text:style-name="T3"/></text:p>
        </text:list-item>
        <text:list-item>
          <text:p text:style-name="P32" loext:marker-style-name="T3"><text:span text:style-name="T3">Rilevare eventuali rotture/danni ad materiali.</text:span><text:span text:style-name="T3"/></text:p>
        </text:list-item>
        <text:list-item>
          <text:p text:style-name="P32" loext:marker-style-name="T3"><text:span text:style-name="T3">Se richiesto generare e/o stampare attestati di presenza per volontari.</text:span><text:span text:style-name="T3"/></text:p>
        </text:list-item>
      </text:list>
      <text:p text:style-name="P6" loext:marker-style-name="T3"><text:span text:style-name="T3"><text:line-break/>Ad una risorsa (volontario, mezzo o attrezzatura) che abbandona il campo in quanto ha finito il turno di servizio (non rimane quindi a pernottare al campo) deve essere sempre assegnato il servizio “USCITA DEFINITIVA” (PAGINA INIZIALE/GESTIONE RISORSE), per consentire al sistema di aggiornare i campi DATA/ORA USCITA DEFINITIVA e DATA FINE ATTESTATO. Se la risorsa ritorna al campo per una nuovo turno di servizio, deve essere registrata nuovamente.</text:span><text:span text:style-name="T3"/></text:p>
      <text:p text:style-name="P6" loext:marker-style-name="T3"><text:span text:style-name="T3">Se necessario, è possibile applicare modello per stampare il modulo A (in alcuni casi vale come attestato del mezzo per la richiesta rimborsi Art. 9, quando concesso). Verificare che i dati inseriti siano corretti (informazioni mezzi, KM registrati).</text:span><text:span text:style-name="T3"/></text:p>
      <text:h text:style-name="P7" text:outline-level="2" loext:marker-style-name="T1"><text:bookmark text:name="registrazione_operatori"/><text:bookmark-start text:name="__RefHeading___Toc156_474057684"/><text:span text:style-name="T1">P07. REGISTRAZIONE OPERATORI</text:span><text:bookmark-end text:name="__RefHeading___Toc156_474057684"/><text:span text:style-name="T1"/></text:h>
      <text:p text:style-name="P6" loext:marker-style-name="T3"><text:span text:style-name="T3">I funzionari (es. provinciali, regionali o DPC) vanno inseriti in RISORSE/OPERATORI.</text:span><text:span text:style-name="T3"/></text:p>
      <text:h text:style-name="P7" text:outline-level="2" loext:marker-style-name="T1"><text:bookmark text:name="stampa_badge_volontari_tesserini"/><text:bookmark-start text:name="__RefHeading___Toc158_474057684"/><text:span text:style-name="T1">P08. STAMPA BADGE VOLONTARI E MEZZI</text:span><text:bookmark-end text:name="__RefHeading___Toc158_474057684"/><text:span text:style-name="T1"/></text:h>
      <text:p text:style-name="P6" loext:marker-style-name="T3"><text:span text:style-name="T3">Utilizzare apposito modello presente nelle scheda dati VOLONTARI, MEZZI, OPERATORI. Verificare, al momento della stampa, che nelle opzioni di stampa non ci sia alcun ridimensionamento della pagina.</text:span><text:span text:style-name="T3"/></text:p>
      <text:h text:style-name="P7" text:outline-level="2" loext:marker-style-name="T1"><text:bookmark text:name="censimento_strutture"/><text:bookmark-start text:name="__RefHeading___Toc160_474057684"/><text:span text:style-name="T1">P09. CENSIMENTO STRUTTURE</text:span><text:bookmark-end text:name="__RefHeading___Toc160_474057684"/><text:span text:style-name="T1"/></text:h>
      <text:p text:style-name="P6" loext:marker-style-name="T3"><text:span text:style-name="T3">Le strutture montate al campo (tende ospiti, segreteria, cucina, ecc…) vanno codificate e censite nell'apposita schermata CAMPO/STRUTTURE.</text:span><text:span text:style-name="T3"/></text:p>
      <text:p text:style-name="P6" loext:marker-style-name="T3"><text:span text:style-name="T3">Il campo prima assegnazione può essere utilizzato per una prima assegnazione di massima (es. per nucleo famigliare) della tenda agli ospiti: seguirà poi un censimento puntuale (scheda OSPITI).</text:span><text:span text:style-name="T3"/></text:p>
      <text:p text:style-name="P6" loext:marker-style-name="T3"><text:span text:style-name="T3">Per l'assegnazione del “numero tenda”, si consiglia di usare un formato “lettera+numero”, es. A1,A2,B5…</text:span><text:span text:style-name="T3"/></text:p>
      <text:h text:style-name="P7" text:outline-level="2" loext:marker-style-name="T1"><text:bookmark text:name="registrazione_ospiti"/><text:bookmark-start text:name="__RefHeading___Toc162_474057684"/><text:span text:style-name="T1">P10. REGISTRAZIONE OSPITI</text:span><text:bookmark-end text:name="__RefHeading___Toc162_474057684"/><text:span text:style-name="T1"/></text:h>
      <text:p text:style-name="P6" loext:marker-style-name="T3"><text:span text:style-name="T3">In CAMPO/OSPITI vanno inseriti gli ospiti del campo di accoglienza.</text:span><text:span text:style-name="T3"/></text:p>
      <text:p text:style-name="P6" loext:marker-style-name="T3"><text:span text:style-name="T3">Obbligatori tenda, nome, cognome, sesso, anno di nascita e nucleo famigliare.</text:span><text:span text:style-name="T3"/></text:p>
      <text:p text:style-name="P6" loext:marker-style-name="T3"><text:span text:style-name="T3">Verificare se ci sono donne incinta, disabili e allettati.</text:span><text:span text:style-name="T3"/></text:p>
      <text:p text:style-name="P6" loext:marker-style-name="T3"><text:span text:style-name="T3">Nella schermata CAMPO/EX OSPITI vanno inseriti gli ospiti che lasciano il campo prima di essere eliminati dalla schermata CAMPO/OSPITI.</text:span><text:span text:style-name="T3"/></text:p>
      <text:p text:style-name="P6" loext:marker-style-name="T3"><text:soft-page-break/><text:span text:style-name="T3">Nella schermata OSPITI/ESTERNI c’è l’elenco di persone che non sono registrate al campo ma usufruiscono per motivi vari (casa inagibile, servizi offerti al campo, ecc…) di alcuni servizi (es. pranzo).</text:span><text:span text:style-name="T3"/></text:p>
      <text:p text:style-name="P6" loext:marker-style-name="T3"><text:span text:style-name="T3">In CAMPO/OSPITI/Occupazione tende c’è il riepilogo delle tende con i posti occupati per ognuna.</text:span><text:span text:style-name="T3"/></text:p>
      <text:p text:style-name="P6" loext:marker-style-name="T3"><text:span text:style-name="T3">In CAMPO/OSPITI/Cittadinanze c’è il prospetto con il numero di volontari per cittadinanza.</text:span><text:span text:style-name="T3"/></text:p>
      <text:h text:style-name="P7" text:outline-level="2" loext:marker-style-name="T1"><text:bookmark text:name="stampa_badge_ospiti_esterni_visitatori"/><text:bookmark-start text:name="__RefHeading___Toc164_474057684"/><text:span text:style-name="T1">P11. STAMPA BADGE OSPITI/ESTERNI/VISITATORI</text:span><text:bookmark-end text:name="__RefHeading___Toc164_474057684"/><text:span text:style-name="T1"/></text:h>
      <text:p text:style-name="P6" loext:marker-style-name="T3"><text:span text:style-name="T3">Utilizzare apposito modello. Verificare, al momento della stampa, che nelle opzioni di stampa non ci sia alcun ridimensionamento della pagina.</text:span><text:span text:style-name="T3"/></text:p>
      <text:h text:style-name="P7" text:outline-level="2" loext:marker-style-name="T1"><text:bookmark text:name="rubrica"/><text:bookmark-start text:name="__RefHeading___Toc166_474057684"/><text:span text:style-name="T1">P12. RUBRICA</text:span><text:bookmark-end text:name="__RefHeading___Toc166_474057684"/><text:span text:style-name="T1"/></text:h>
      <text:p text:style-name="P6" loext:marker-style-name="T3"><text:span text:style-name="T3">I numeri utili del campo (riferimenti funzioni, responsabili di altri campi, referenti di ditte, ecc…) vanno inseriti e tenuti aggiornati nella schermata RUBRICA.</text:span><text:span text:style-name="T3"/></text:p>
      <text:h text:style-name="P7" text:outline-level="2" loext:marker-style-name="T1"><text:bookmark text:name="richieste"/><text:bookmark-start text:name="__RefHeading___Toc168_474057684"/><text:span text:style-name="T1">P13. TRACCIAMENTO RICHIESTE</text:span><text:bookmark-end text:name="__RefHeading___Toc168_474057684"/><text:span text:style-name="T1"/></text:h>
      <text:p text:style-name="P6" loext:marker-style-name="T3"><text:span text:style-name="T3">In questa area è possibile registrare qualsiasi richiesta di risorse (richiesta interna) ed ospiti (esterna), come ad esempio esigenze, materiale, documenti, beni di consumo ecc…</text:span><text:span text:style-name="T3"/></text:p>
      <text:p text:style-name="P6" loext:marker-style-name="T3"><text:span text:style-name="T3">Le richieste verranno poi vagliate dal responsabile dell'evento.</text:span><text:span text:style-name="T3"/></text:p>
      <text:p text:style-name="P6" loext:marker-style-name="T3"><text:span text:style-name="T3">Tramite il cambio di stato sarà possibile aggiornarne l'avanzamento della richiesta (Presa in carico/In valutazione/In lavorazione/In attesa di lavorazione/Eseguita/Respinta).</text:span><text:span text:style-name="T3"/></text:p>
      <text:h text:style-name="P7" text:outline-level="2" loext:marker-style-name="T1"><text:bookmark text:name="protocollo"/><text:bookmark-start text:name="__RefHeading___Toc170_474057684"/><text:span text:style-name="T1">P14. PROTOCOLLO</text:span><text:bookmark-end text:name="__RefHeading___Toc170_474057684"/><text:span text:style-name="T1"/></text:h>
      <text:p text:style-name="P6" loext:marker-style-name="T3"><text:span text:style-name="T3">Tutte le comunicazioni rilevanti in entrata/uscita (e-mail o cartacee) vanno archiviate e protocollate. Utilizzare la schermata PROTOCOLLO per assegnare il numero di protocollo, da scrivere poi sul documento o sulla stampa dell’e-mail.</text:span><text:span text:style-name="T3"/></text:p>
      <text:p text:style-name="P6" loext:marker-style-name="T3"><text:span text:style-name="T3">Periodicamente verificare non ci siano “buchi” nel protocollo ed archiviare i documenti.</text:span><text:span text:style-name="T3"/></text:p>
      <text:h text:style-name="P7" text:outline-level="2" loext:marker-style-name="T1"><text:bookmark text:name="avvisi"/><text:bookmark-start text:name="__RefHeading___Toc172_474057684"/><text:span text:style-name="T1">P15. BACHECA AVVISI</text:span><text:bookmark-end text:name="__RefHeading___Toc172_474057684"/><text:span text:style-name="T1"/></text:h>
      <text:p text:style-name="P6" loext:marker-style-name="T3"><text:span text:style-name="T3">In COMUNICAZIONI/AVVISI è possibile inserire e stampare (applicando modello) tutte le comunicazioni da esporre al campo, a beneficio degli ospiti o delle risorse. Il sistema stampa in automatico l'intestazione del campo e la data di creazione dell'avviso.</text:span><text:span text:style-name="T3"/></text:p>
      <text:h text:style-name="P7" text:outline-level="2" loext:marker-style-name="T1"><text:bookmark text:name="consegna_radio"/><text:bookmark-start text:name="__RefHeading___Toc174_474057684"/><text:span text:style-name="T1">P16. CONSEGNA RADIO</text:span><text:bookmark-end text:name="__RefHeading___Toc174_474057684"/><text:span text:style-name="T1"/></text:h>
      <text:p text:style-name="P6" loext:marker-style-name="T3"><text:span text:style-name="T3">Per aver un tracciato delle radio consegnate al personale in assenza di una sala radio.</text:span><text:span text:style-name="T3"/></text:p>
      <text:h text:style-name="P7" text:outline-level="2" loext:marker-style-name="T1"><text:bookmark text:name="segnalazione_danneggiamento_mezzo_attrez"/><text:bookmark-start text:name="__RefHeading___Toc176_474057684"/><text:span text:style-name="T1">P17. SEGNALAZIONE DANNEGGIAMENTO MEZZO/ATTREZZATURA</text:span><text:bookmark-end text:name="__RefHeading___Toc176_474057684"/><text:span text:style-name="T1"/></text:h>
      <text:p text:style-name="P6" loext:marker-style-name="T3"><text:span text:style-name="T3">Tramite apposita scheda in COMUNICAZIONI/DANNEGGIAMENTI è possibile tracciare i danneggiamenti. Successivamente applicare apposito modello, stampare e far firmare a responsabile/caposquadra e controfirmare a funzionario in turno.</text:span><text:span text:style-name="T3"/></text:p>
      <text:h text:style-name="P7" text:outline-level="2" loext:marker-style-name="T1"><text:bookmark text:name="backup_dati"/><text:bookmark-start text:name="__RefHeading___Toc190_474057684"/><text:soft-page-break/><text:span text:style-name="T1">P18. BACKUP DATI</text:span><text:bookmark-end text:name="__RefHeading___Toc190_474057684"/><text:span text:style-name="T1"/></text:h>
      <text:p text:style-name="P6" loext:marker-style-name="T3"><text:span text:style-name="T3">In PAGINA INIZIALE/CONFIGURAZIONE è possibile esportare:</text:span><text:span text:style-name="T3"/></text:p>
      <text:list text:style-name="WWNum15">
        <text:list-item>
          <text:p text:style-name="P33" loext:marker-style-name="T3"><text:span text:style-name="T3">le singole schede dati in formato Excel;</text:span><text:span text:style-name="T3"/></text:p>
        </text:list-item>
        <text:list-item>
          <text:p text:style-name="P33" loext:marker-style-name="T3"><text:span text:style-name="T3">l'intero database.</text:span><text:span text:style-name="T3"/></text:p>
        </text:list-item>
      </text:list>
      <text:p text:style-name="P6" loext:marker-style-name="T1"><text:span text:style-name="T1"><text:line-break/>Si consiglia di effettuare questa operazione almeno una volta al giorno o comunque ad ogni cambio turno.</text:span><text:span text:style-name="T1"/></text:p>
      <text:h text:style-name="P7" text:outline-level="2" loext:marker-style-name="T1"><text:bookmark text:name="stime_pasti"/><text:bookmark-start text:name="__RefHeading___Toc180_474057684"/><text:span text:style-name="T1">P19. STIME PASTI</text:span><text:bookmark-end text:name="__RefHeading___Toc180_474057684"/><text:span text:style-name="T1"/></text:h>
      <text:p text:style-name="P6" loext:marker-style-name="T3"><text:span text:style-name="T3">Nella scheda CAMPO/STIME PASTI è possibile inserire i numeri di pasti previsti suddividendo tra colazione pranzo e cena</text:span><text:span text:style-name="T3"/></text:p>
      <text:h text:style-name="P7" text:outline-level="2" loext:marker-style-name="T1"><text:bookmark text:name="registrazione_numero_pasti"/><text:bookmark-start text:name="__RefHeading___Toc182_474057684"/><text:span text:style-name="T1">P20. REGISTRAZIONE NUMERO PASTI</text:span><text:bookmark-end text:name="__RefHeading___Toc182_474057684"/><text:span text:style-name="T1"/></text:h>
      <text:p text:style-name="P6" loext:marker-style-name="T3"><text:span text:style-name="T3">L’accesso a colazione, pranzo e cena di volontari e ospiti viene registrato tramite lettura del codice a barre presente sui badge. Viene utilizzato apposito programma (disponibile a breve).</text:span><text:span text:style-name="T3"/></text:p>
      <text:h text:style-name="P7" text:outline-level="2" loext:marker-style-name="T1"><text:bookmark text:name="brogliaccio"/><text:bookmark-start text:name="__RefHeading___Toc184_474057684"/><text:span text:style-name="T1">P21. BROGLIACCIO</text:span><text:bookmark-end text:name="__RefHeading___Toc184_474057684"/><text:span text:style-name="T1"/></text:h>
      <text:p text:style-name="P6" loext:marker-style-name="T3"><text:span text:style-name="T3">Nella scheda SERVIZI/BROGLIACCIO è possibile inserire una sorta di diario delle attività quotidiane. Permette infatti la registrazione cronologica di appunti, segnalazioni, info varie che arrivano alla segreteria e che posso essere ritenute utili per la sala operativa. Applicando apposito modello si avrà cronistoria completa della giornata.</text:span><text:span text:style-name="T3"/></text:p>
      <text:h text:style-name="P7" text:outline-level="2" loext:marker-style-name="T1"><text:bookmark text:name="report_operativo_giornaliero"/><text:bookmark-start text:name="__RefHeading___Toc186_474057684"/><text:span text:style-name="T1">P22. REPORT OPERATIVO GIORNALIERO</text:span><text:bookmark-end text:name="__RefHeading___Toc186_474057684"/><text:span text:style-name="T1"/></text:h>
      <text:p text:style-name="P6" loext:marker-style-name="T3"><text:span text:style-name="T3">La scheda SERVIZI/REPORT permette a funzionari/responsabili di funzione la redazione di un report periodico (es. giornaliero) relativamente al servizio effettuato. La pagina si articola in sezioni descrittive (SINTESI ATTIVITA' SVOLTE, CRITICITA' RISCONTRATE) ed una parte in cui selezionare SI/NO (DIFF. COORD. VOLONTARI, RITARDI CAMBI TURNO/MEZZO, DIFFICOLTA' NELLE COMUNICAZIONI). Al termine del turno/servizio si può applicare modello (STAMPA) per invio in sala operativa</text:span><text:span text:style-name="T3"/></text:p>
      <text:h text:style-name="P7" text:outline-level="2" loext:marker-style-name="T1"><text:bookmark text:name="report"/><text:bookmark-start text:name="__RefHeading___Toc188_474057684"/><text:span text:style-name="T1">P23. REPORT</text:span><text:bookmark-end text:name="__RefHeading___Toc188_474057684"/><text:span text:style-name="T1"/></text:h>
      <text:p text:style-name="P6" loext:marker-style-name="T3"><text:span text:style-name="T3">In PAGINA INIZIALE/REPORT è possibile visualizzare alcune informazioni di riepilogo sulla situazione attuale, tramite grafici e tabelle. Tramite il pulsante “Esporta in PDF” è possibile salvare la pagina in formato PDF.</text:span><text:span text:style-name="T3"/></text:p>
      <text:p text:style-name="P6" loext:marker-style-name="T3"><text:span text:style-name="T3">Tramite il pulsante “Riepilogo ospiti e risorse” è possibile visualizzare un prospetto di riepilogo con le informazioni sugli volontari e ospiti presenti al campo (fasce età, nazionalità, ecc…)</text:span><text:span text:style-name="T3"/></text:p>
      <text:h text:style-name="P7" text:outline-level="2" loext:marker-style-name="T1"><text:bookmark text:name="Copia_di_report_1"/><text:bookmark-start text:name="__RefHeading___Toc1259_1326959477"/><text:bookmark-start text:name="Copia_di___RefHeading___Toc188_474057684"/><text:soft-page-break/><text:span text:style-name="T1">P24. CONTROLLO DATI</text:span><text:bookmark-end text:name="__RefHeading___Toc1259_1326959477"/><text:bookmark-end text:name="Copia_di___RefHeading___Toc188_474057684"/><text:span text:style-name="T1"/></text:h>
      <text:p text:style-name="P6" loext:marker-style-name="T3"><text:span text:style-name="T3">In PAGINA INIZIALE/VERIFICA DATI/CONTROLLO DATI è possibile verificare che non siano presenti anomalie o incongruenze.</text:span><text:span text:style-name="T3"/></text:p>
      <text:h text:style-name="P34" text:outline-level="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fo:hyphenation-ladder-count="no-limit" fo:hyphenation-keep="auto" loext:hyphenation-keep-type="column" loext:hyphenation-keep-line="false" style:punctuation-wrap="hanging" style:writing-mode="lr-tb"/>
      <style:text-properties style:use-window-font-color="true" loext:opacity="0%"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charset="x-symbol" style:font-name-asian="OpenSymbol1" style:font-family-asian="OpenSymbol" style:font-family-generic-asian="system" style:font-pitch-asian="variable" style:font-charset-asian="x-symbol" style:font-name-complex="OpenSymbol1" style:font-family-complex="OpenSymbol" style:font-family-generic-complex="system" style:font-pitch-complex="variable"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0" style:display-name="ListLabel 2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1" style:display-name="ListLabel 2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2" style:display-name="ListLabel 2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3" style:display-name="ListLabel 2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4" style:display-name="ListLabel 2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5" style:display-name="ListLabel 2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6" style:display-name="ListLabel 2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7" style:display-name="ListLabel 2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8" style:display-name="ListLabel 2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9" style:display-name="ListLabel 2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0" style:display-name="ListLabel 3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1" style:display-name="ListLabel 3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2" style:display-name="ListLabel 3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3" style:display-name="ListLabel 3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4" style:display-name="ListLabel 3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5" style:display-name="ListLabel 3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6" style:display-name="ListLabel 3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7" style:display-name="ListLabel 3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8" style:display-name="ListLabel 3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9" style:display-name="ListLabel 3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0" style:display-name="ListLabel 4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1" style:display-name="ListLabel 4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2" style:display-name="ListLabel 4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3" style:display-name="ListLabel 4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4" style:display-name="ListLabel 4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5" style:display-name="ListLabel 4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6" style:display-name="ListLabel 4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7" style:display-name="ListLabel 4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8" style:display-name="ListLabel 4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9" style:display-name="ListLabel 4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0" style:display-name="ListLabel 5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1" style:display-name="ListLabel 5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2" style:display-name="ListLabel 5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3" style:display-name="ListLabel 5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4" style:display-name="ListLabel 5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5" style:display-name="ListLabel 5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6" style:display-name="ListLabel 5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7" style:display-name="ListLabel 5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8" style:display-name="ListLabel 5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9" style:display-name="ListLabel 5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0" style:display-name="ListLabel 6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1" style:display-name="ListLabel 6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2" style:display-name="ListLabel 6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3" style:display-name="ListLabel 6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4" style:display-name="ListLabel 6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5" style:display-name="ListLabel 6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6" style:display-name="ListLabel 6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7" style:display-name="ListLabel 6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8" style:display-name="ListLabel 6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9" style:display-name="ListLabel 6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0" style:display-name="ListLabel 7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1" style:display-name="ListLabel 7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2" style:display-name="ListLabel 7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3" style:display-name="ListLabel 7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4" style:display-name="ListLabel 7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5" style:display-name="ListLabel 7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6" style:display-name="ListLabel 7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7" style:display-name="ListLabel 7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8" style:display-name="ListLabel 7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9" style:display-name="ListLabel 7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0" style:display-name="ListLabel 8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1" style:display-name="ListLabel 8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2" style:display-name="ListLabel 8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3" style:display-name="ListLabel 8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4" style:display-name="ListLabel 8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5" style:display-name="ListLabel 8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6" style:display-name="ListLabel 8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7" style:display-name="ListLabel 8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8" style:display-name="ListLabel 8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9" style:display-name="ListLabel 8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0" style:display-name="ListLabel 9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1" style:display-name="ListLabel 9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2" style:display-name="ListLabel 9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3" style:display-name="ListLabel 9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4" style:display-name="ListLabel 9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5" style:display-name="ListLabel 9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6" style:display-name="ListLabel 9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7" style:display-name="ListLabel 9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8" style:display-name="ListLabel 9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9" style:display-name="ListLabel 9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0" style:display-name="ListLabel 10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1" style:display-name="ListLabel 10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2" style:display-name="ListLabel 10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3" style:display-name="ListLabel 10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4" style:display-name="ListLabel 10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5" style:display-name="ListLabel 10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6" style:display-name="ListLabel 10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7" style:display-name="ListLabel 10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8" style:display-name="ListLabel 10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9" style:display-name="ListLabel 10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0" style:display-name="ListLabel 11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1" style:display-name="ListLabel 11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2" style:display-name="ListLabel 11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3" style:display-name="ListLabel 11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4" style:display-name="ListLabel 11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5" style:display-name="ListLabel 11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6" style:display-name="ListLabel 11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7" style:display-name="ListLabel 11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8" style:display-name="ListLabel 11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9" style:display-name="ListLabel 11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0" style:display-name="ListLabel 12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1" style:display-name="ListLabel 12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2" style:display-name="ListLabel 12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3" style:display-name="ListLabel 12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4" style:display-name="ListLabel 12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5" style:display-name="ListLabel 12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6" style:display-name="ListLabel 12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7" style:display-name="ListLabel 12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8" style:display-name="ListLabel 12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9" style:display-name="ListLabel 12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0" style:display-name="ListLabel 13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31" style:display-name="ListLabel 13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2" style:display-name="ListLabel 13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3" style:display-name="ListLabel 13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34" style:display-name="ListLabel 13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5" style:display-name="ListLabel 13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6" style:display-name="ListLabel 136" style:family="text">
      <style:text-properties fo:font-variant="normal" fo:text-transform="none" fo:color="#337ab7" loext:opacity="100%" style:text-line-through-style="none" style:text-line-through-type="none" style:font-name="Arial" fo:font-family="Arial" style:font-family-generic="swiss" style:font-pitch="variable" fo:font-size="12pt" fo:letter-spacing="normal" fo:font-style="normal" style:text-underline-style="none" fo:font-weight="normal" style:text-blinking="false" fo:background-color="transparent" style:font-size-asian="12pt" style:font-style-asian="normal" style:font-weight-asian="normal"/>
    </style:style>
    <style:style style:name="ListLabel_20_137" style:display-name="ListLabel 137" style:family="text">
      <style:text-properties fo:font-variant="normal" fo:text-transform="none" fo:color="#333333" loext:opacity="100%" style:font-name="Arial" fo:font-family="Arial" style:font-family-generic="swiss" style:font-pitch="variable" fo:font-size="12pt" fo:letter-spacing="normal" fo:font-style="normal" fo:font-weight="normal" style:font-size-asian="12pt" style:font-style-asian="normal" style:font-weight-asian="normal"/>
    </style:style>
    <style:style style:name="ListLabel_20_138" style:display-name="ListLabel 1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3-19T12:16:04</meta:creation-date>
    <dc:language>en-US</dc:language>
    <dc:date>2026-06-08T08:00:21.714518300</dc:date>
    <meta:editing-cycles>39</meta:editing-cycles>
    <meta:editing-duration>PT9H37M49S</meta:editing-duration>
    <meta:generator>LibreOffice/26.2.4.2$Windows_X86_64 LibreOffice_project/0229ac93fcf0d7cbc6376066c6f35021cef002dc</meta:generator>
    <meta:document-statistic meta:table-count="0" meta:image-count="11" meta:object-count="0" meta:page-count="18" meta:paragraph-count="322" meta:word-count="3975" meta:character-count="27946" meta:non-whitespace-character-count="24227"/>
    <meta:user-defined meta:name="AppVersion">15.0000</meta:user-defined>
  </office:meta>
</office:document-meta>
</file>